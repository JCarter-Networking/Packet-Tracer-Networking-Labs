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b615" officeooo:paragraph-rsid="0012b615"/>
    </style:style>
    <style:style style:name="P2" style:family="paragraph" style:parent-style-name="Standard">
      <style:text-properties officeooo:rsid="0012b615" officeooo:paragraph-rsid="0016d63d"/>
    </style:style>
    <style:style style:name="P3" style:family="paragraph" style:parent-style-name="Standard">
      <style:text-properties officeooo:rsid="0012ce26" officeooo:paragraph-rsid="0016d63d"/>
    </style:style>
    <style:style style:name="P4" style:family="paragraph" style:parent-style-name="Standard">
      <style:text-properties officeooo:rsid="0012ce26" officeooo:paragraph-rsid="0012ce26"/>
    </style:style>
    <style:style style:name="P5" style:family="paragraph" style:parent-style-name="Standard">
      <style:text-properties fo:font-weight="normal" officeooo:rsid="0012b615" officeooo:paragraph-rsid="0012b615" style:font-weight-asian="normal" style:font-weight-complex="normal"/>
    </style:style>
    <style:style style:name="P6" style:family="paragraph" style:parent-style-name="Standard">
      <style:text-properties fo:font-weight="normal" officeooo:rsid="0012ce26" officeooo:paragraph-rsid="0012ce26" style:font-weight-asian="normal" style:font-weight-complex="normal"/>
    </style:style>
    <style:style style:name="P7" style:family="paragraph" style:parent-style-name="Standard">
      <style:text-properties fo:font-weight="normal" officeooo:rsid="0014389d" officeooo:paragraph-rsid="0014389d" style:font-weight-asian="normal" style:font-weight-complex="normal"/>
    </style:style>
    <style:style style:name="P8" style:family="paragraph" style:parent-style-name="Standard">
      <style:text-properties officeooo:rsid="0014389d" officeooo:paragraph-rsid="0014389d"/>
    </style:style>
    <style:style style:name="P9" style:family="paragraph" style:parent-style-name="Text_20_body">
      <style:text-properties officeooo:rsid="0014389d" officeooo:paragraph-rsid="00168d86"/>
    </style:style>
    <style:style style:name="P10" style:family="paragraph" style:parent-style-name="Standard">
      <style:text-properties officeooo:rsid="00158848" officeooo:paragraph-rsid="00158848"/>
    </style:style>
    <style:style style:name="P11" style:family="paragraph" style:parent-style-name="Standard">
      <style:text-properties fo:font-weight="bold" officeooo:rsid="0014389d" officeooo:paragraph-rsid="001500ec" style:font-weight-asian="bold" style:font-weight-complex="bold"/>
    </style:style>
    <style:style style:name="P12" style:family="paragraph" style:parent-style-name="Standard">
      <style:text-properties officeooo:rsid="0014389d" officeooo:paragraph-rsid="001500ec"/>
    </style:style>
    <style:style style:name="P13" style:family="paragraph" style:parent-style-name="Standard">
      <style:text-properties fo:font-weight="bold" officeooo:rsid="00158848" officeooo:paragraph-rsid="00158848" style:font-weight-asian="bold" style:font-weight-complex="bold"/>
    </style:style>
    <style:style style:name="P14" style:family="paragraph" style:parent-style-name="Standard">
      <style:text-properties fo:color="#168253" loext:opacity="100%" fo:font-weight="bold" officeooo:rsid="0012ce26" officeooo:paragraph-rsid="0012ce26" style:font-weight-asian="bold" style:font-weight-complex="bold"/>
    </style:style>
    <style:style style:name="P15" style:family="paragraph" style:parent-style-name="Standard">
      <style:text-properties fo:color="#168253" loext:opacity="100%" fo:font-weight="bold" officeooo:rsid="0012ce26" officeooo:paragraph-rsid="00168d86" style:font-weight-asian="bold" style:font-weight-complex="bold"/>
    </style:style>
    <style:style style:name="P16" style:family="paragraph" style:parent-style-name="Standard">
      <style:text-properties fo:color="#000000" loext:opacity="100%" fo:font-weight="bold" officeooo:rsid="00158848" officeooo:paragraph-rsid="00158848" style:font-weight-asian="bold" style:font-weight-complex="bold"/>
    </style:style>
    <style:style style:name="P17" style:family="paragraph" style:parent-style-name="Standard">
      <style:text-properties fo:color="#000000" loext:opacity="100%" fo:font-weight="normal" officeooo:rsid="00168d86" officeooo:paragraph-rsid="00168d86" style:font-weight-asian="normal" style:font-weight-complex="normal"/>
    </style:style>
    <style:style style:name="P18" style:family="paragraph" style:parent-style-name="Standard">
      <style:text-properties fo:color="#168253" loext:opacity="100%" fo:font-weight="bold" officeooo:rsid="00168d86" officeooo:paragraph-rsid="00168d86" style:font-weight-asian="bold" style:font-weight-complex="bold"/>
    </style:style>
    <style:style style:name="P19" style:family="paragraph" style:parent-style-name="Standard">
      <style:text-properties fo:color="#000000" loext:opacity="100%" fo:font-weight="bold" officeooo:rsid="00158848" officeooo:paragraph-rsid="00168d86" style:font-weight-asian="bold" style:font-weight-complex="bold"/>
    </style:style>
    <style:style style:name="P20" style:family="paragraph" style:parent-style-name="Standard">
      <style:text-properties fo:color="#ff4000" loext:opacity="100%" fo:font-weight="bold" officeooo:rsid="00168d86" officeooo:paragraph-rsid="00168d86" style:font-weight-asian="bold" style:font-weight-complex="bold"/>
    </style:style>
    <style:style style:name="P21" style:family="paragraph" style:parent-style-name="Standard">
      <style:text-properties fo:color="#ff4000" loext:opacity="100%" fo:font-weight="bold" officeooo:rsid="0012b615" officeooo:paragraph-rsid="0012b615" style:font-weight-asian="bold" style:font-weight-complex="bold"/>
    </style:style>
    <style:style style:name="P22" style:family="paragraph" style:parent-style-name="Standard">
      <style:text-properties fo:font-weight="normal" officeooo:rsid="0012b615" officeooo:paragraph-rsid="001741c9" style:font-weight-asian="normal" style:font-weight-complex="normal"/>
    </style:style>
    <style:style style:name="P23" style:family="paragraph" style:parent-style-name="Standard">
      <style:text-properties fo:font-weight="normal" officeooo:rsid="0016d63d" officeooo:paragraph-rsid="001741c9" style:font-weight-asian="normal" style:font-weight-complex="normal"/>
    </style:style>
    <style:style style:name="P24" style:family="paragraph" style:parent-style-name="Standard">
      <style:text-properties fo:color="#000000" loext:opacity="100%" fo:font-weight="bold" officeooo:rsid="00158848" officeooo:paragraph-rsid="0016d63d" style:font-weight-asian="bold" style:font-weight-complex="bold"/>
    </style:style>
    <style:style style:name="P25" style:family="paragraph" style:parent-style-name="Standard">
      <style:text-properties fo:color="#000000" loext:opacity="100%" officeooo:rsid="00168d86" officeooo:paragraph-rsid="00176825"/>
    </style:style>
    <style:style style:name="P26" style:family="paragraph" style:parent-style-name="Standard">
      <style:text-properties fo:font-weight="normal" officeooo:rsid="0012b615" officeooo:paragraph-rsid="00176825" style:font-weight-asian="normal" style:font-weight-complex="normal"/>
    </style:style>
    <style:style style:name="P27" style:family="paragraph" style:parent-style-name="Standard">
      <style:text-properties fo:color="#000000" loext:opacity="100%" fo:font-weight="normal" officeooo:rsid="00176825" officeooo:paragraph-rsid="00176825" style:font-weight-asian="normal" style:font-weight-complex="normal"/>
    </style:style>
    <style:style style:name="P28" style:family="paragraph" style:parent-style-name="Standard">
      <style:text-properties fo:color="#000000" loext:opacity="100%" fo:font-weight="normal" officeooo:rsid="001741c9" officeooo:paragraph-rsid="00176825" style:font-weight-asian="normal" style:font-weight-complex="normal"/>
    </style:style>
    <style:style style:name="P29" style:family="paragraph" style:parent-style-name="Standard">
      <style:text-properties fo:font-weight="normal" officeooo:rsid="001741c9" officeooo:paragraph-rsid="00176825" style:font-weight-asian="normal" style:font-weight-complex="normal"/>
    </style:style>
    <style:style style:name="P30" style:family="paragraph" style:parent-style-name="Standard">
      <style:text-properties officeooo:paragraph-rsid="00176825"/>
    </style:style>
    <style:style style:name="T1" style:family="text">
      <style:text-properties fo:color="#ff4000" loext:opacity="100%" fo:font-size="15pt" fo:font-weight="bold" style:font-size-asian="15pt" style:font-weight-asian="bold" style:font-size-complex="15pt" style:font-weight-complex="bold"/>
    </style:style>
    <style:style style:name="T2" style:family="text">
      <style:text-properties fo:color="#ff4000" loext:opacity="100%" fo:font-weight="bold" style:font-weight-asian="bold" style:font-weight-complex="bold"/>
    </style:style>
    <style:style style:name="T3" style:family="text">
      <style:text-properties fo:color="#000000" loext:opacity="100%" fo:font-weight="normal" officeooo:rsid="0016d63d" style:font-weight-asian="normal" style:font-weight-complex="normal"/>
    </style:style>
    <style:style style:name="T4" style:family="text">
      <style:text-properties fo:color="#168253" loext:opacity="100%" fo:font-weight="bold" officeooo:rsid="0016d63d" style:font-weight-asian="bold" style:font-weight-complex="bold"/>
    </style:style>
    <style:style style:name="T5" style:family="text">
      <style:text-properties officeooo:rsid="0016d63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officeooo:rsid="0012ce26"/>
    </style:style>
    <style:style style:name="T9" style:family="text">
      <style:text-properties fo:color="#158466" loext:opacity="100%" fo:font-weight="bold" officeooo:rsid="0014389d" style:font-weight-asian="bold" style:font-weight-complex="bold"/>
    </style:style>
    <style:style style:name="T10" style:family="text">
      <style:text-properties fo:color="#158466" loext:opacity="100%" fo:font-weight="bold" officeooo:rsid="0016d63d" style:font-weight-asian="bold" style:font-weight-complex="bold"/>
    </style:style>
    <style:style style:name="T11" style:family="text">
      <style:text-properties officeooo:rsid="0014389d"/>
    </style:style>
    <style:style style:name="T12" style:family="text">
      <style:text-properties officeooo:rsid="001500ec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58848" style:font-weight-asian="normal" style:font-weight-complex="normal"/>
    </style:style>
    <style:style style:name="T15" style:family="text">
      <style:text-properties officeooo:rsid="00158848"/>
    </style:style>
    <style:style style:name="T16" style:family="text">
      <style:text-properties officeooo:rsid="00168d86"/>
    </style:style>
    <style:style style:name="T17" style:family="text">
      <style:text-properties fo:font-weight="normal" officeooo:rsid="001500ec" style:font-weight-asian="normal" style:font-weight-complex="normal"/>
    </style:style>
    <style:style style:name="T18" style:family="text">
      <style:text-properties fo:color="#000000" loext:opacity="100%" fo:font-weight="normal" style:font-weight-asian="normal" style:font-weight-complex="normal"/>
    </style:style>
    <style:style style:name="T19" style:family="text">
      <style:text-properties fo:color="#000000" loext:opacity="100%" fo:font-weight="normal" officeooo:rsid="00158848" style:font-weight-asian="normal" style:font-weight-complex="normal"/>
    </style:style>
    <style:style style:name="T20" style:family="text">
      <style:text-properties officeooo:rsid="001741c9"/>
    </style:style>
    <style:style style:name="T21" style:family="text">
      <style:text-properties fo:font-weight="normal" officeooo:rsid="00168d86" style:font-weight-asian="normal" style:font-weight-complex="normal"/>
    </style:style>
    <style:style style:name="T22" style:family="text">
      <style:text-properties fo:color="#168253" loext:opacity="100%" fo:font-weight="bold" style:font-weight-asian="bold" style:font-weight-complex="bold"/>
    </style:style>
    <style:style style:name="T23" style:family="text">
      <style:text-properties fo:color="#168253" loext:opacity="100%"/>
    </style:style>
    <style:style style:name="T24" style:family="text">
      <style:text-properties fo:color="#168253" loext:opacity="100%" officeooo:rsid="0016d63d"/>
    </style:style>
    <style:style style:name="T25" style:family="text">
      <style:text-properties fo:color="#000000" loext:opacity="100%" fo:font-size="12pt" officeooo:rsid="001741c9" style:font-size-asian="12pt" style:font-size-complex="12pt"/>
    </style:style>
    <style:style style:name="T26" style:family="text">
      <style:text-properties fo:color="#168253" loext:opacity="100%" fo:font-weight="bold" officeooo:rsid="001741c9" style:font-weight-asian="bold" style:font-weight-complex="bold"/>
    </style:style>
    <style:style style:name="T27" style:family="text">
      <style:text-properties fo:font-weight="normal" officeooo:rsid="0016d63d" style:font-weight-asian="normal" style:font-weight-complex="normal"/>
    </style:style>
    <style:style style:name="T28" style:family="text">
      <style:text-properties fo:font-weight="normal" officeooo:rsid="001741c9" style:font-weight-asian="normal" style:font-weight-complex="normal"/>
    </style:style>
    <style:style style:name="T29" style:family="text">
      <style:text-properties fo:font-weight="normal" officeooo:rsid="00176825" style:font-weight-asian="normal" style:font-weight-complex="normal"/>
    </style:style>
    <style:style style:name="T30" style:family="text">
      <style:text-properties officeooo:rsid="00176825"/>
    </style:style>
    <style:style style:name="T31" style:family="text">
      <style:text-properties fo:color="#000000" loext:opacity="100%" officeooo:rsid="001741c9"/>
    </style:style>
    <style:style style:name="T32" style:family="text">
      <style:text-properties fo:color="#000000" loext:opacity="100%" fo:font-weight="bold" style:font-weight-asian="bold" style:font-weight-complex="bold"/>
    </style:style>
    <style:style style:name="T33" style:family="text">
      <style:text-properties fo:color="#000000" loext:opacity="100%"/>
    </style:style>
    <style:style style:name="T34" style:family="text">
      <style:text-properties fo:color="#000000" loext:opacity="100%" officeooo:rsid="00176825"/>
    </style:style>
    <style:style style:name="T35" style:family="text">
      <style:text-properties fo:color="#000000" loext:opacity="100%" fo:font-weight="bold" officeooo:rsid="00176825" style:font-weight-asian="bold" style:font-weight-complex="bold"/>
    </style:style>
    <style:style style:name="T36" style:family="text">
      <style:text-properties fo:color="#000000" loext:opacity="100%" fo:font-weight="normal" officeooo:rsid="00176825" style:font-weight-asian="normal" style:font-weight-complex="normal"/>
    </style:style>
    <style:style style:name="T37" style:family="text">
      <style:text-properties fo:color="#000000" loext:opacity="100%" fo:font-weight="normal" officeooo:rsid="00193c5d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lab is to test out the various priority setting commands of cisco default PVST to see what happens.</text:p>
      <text:p text:style-name="P1"/>
      <text:p text:style-name="P1">These tests will change the priority of Vlan 1 only for ease of learning.</text:p>
      <text:p text:style-name="P1"/>
      <text:p text:style-name="P1"/>
      <text:p text:style-name="P2"><text:span text:style-name="T1">Test 1:</text:span><text:span text:style-name="T2"> </text:span><text:span text:style-name="T3">Set switch 1 to root bridge using priority command</text:span></text:p>
      <text:p text:style-name="P3"><text:span text:style-name="T4">Test 1.1</text:span><text:span text:style-name="T5"> - </text:span>Set Switch 1 priority of 4096 using “spanning-tree vla<text:span text:style-name="T5">n</text:span> 1 priority 4096” </text:p>
      <text:p text:style-name="P4"><text:span text:style-name="T6">Expectation</text:span>: Switch 1 becomes root bridge because it’s priority is now lower than switch 2</text:p>
      <text:p text:style-name="P4"><text:span text:style-name="T6">Outcome</text:span>: Switch 1 successfully becomes root bridge</text:p>
      <text:p text:style-name="P4"/>
      <text:p text:style-name="P5"><text:span text:style-name="T1">Test 2:</text:span><text:span text:style-name="T7"> </text:span><text:span text:style-name="T8">Return Switch 1 priority settings to default 32768 </text:span><text:span text:style-name="T5">without using set priority 32768 command</text:span></text:p>
      <text:p text:style-name="P6"><text:span text:style-name="T9">Test 2.</text:span><text:span text:style-name="T10">1</text:span> – Used ‘no spanning-tree vlan 1’ <text:span text:style-name="T11">in attempt to reset vlan 1 priority setting</text:span></text:p>
      <text:p text:style-name="P7"><text:span text:style-name="T6">Expectation:</text:span> Vlan 1 priority setting returns to 32768 and root bridge is now determined by who has lowest MAC Address</text:p>
      <text:p text:style-name="P7"><text:span text:style-name="T6">Outcome:</text:span> Vlan 1 is missing in Spanning-tree <text:span text:style-name="T12">configuration</text:span></text:p>
      <text:p text:style-name="P8"><text:span text:style-name="T6">Problem Investigation: </text:span><text:span text:style-name="T13">Issuing “</text:span><text:span text:style-name="T14">s</text:span><text:span text:style-name="T13">how </text:span><text:span text:style-name="T14">s</text:span><text:span text:style-name="T13">pan” shows VLAN 1 missing and issuing “show span Vlan 1” states “</text:span>No spanning tree instance exists.” <text:span text:style-name="T15">Issuing “</text:span>show run | include span” <text:span text:style-name="T15">shows:</text:span></text:p>
      <text:p text:style-name="P9"/>
      <text:p text:style-name="P9">no spanning-tree vlan <text:span text:style-name="T16">1</text:span></text:p>
      <text:p text:style-name="P9">spanning-tree vlan 1 priority <text:span text:style-name="T15">4096</text:span></text:p>
      <text:p text:style-name="P10">showing Vlan1 is disabled in spanning tree and the priority setting did not change</text:p>
      <text:p text:style-name="P11"/>
      <text:p text:style-name="P12"><text:span text:style-name="T6">Problem Cause:</text:span> Issuing “no span vlan 1” removes the vlan from spanning tree implementation instead of removing settings <text:span text:style-name="T13">(effectively turned off </text:span><text:span text:style-name="T17">STP</text:span><text:span text:style-name="T13"> for that VLAN on that switch)</text:span></text:p>
      <text:p text:style-name="P13">Solution: <text:span text:style-name="T13">Issue “span vlan 1” to turn spanning tree back on for VLAN 1 but priority stays as 4096</text:span></text:p>
      <text:p text:style-name="P14"/>
      <text:p text:style-name="P15">T<text:span text:style-name="T12">est</text:span> 2.<text:span text:style-name="T5">2</text:span> –<text:span text:style-name="T18"> </text:span><text:span text:style-name="T19">Use ‘no span vlan 1 priority </text:span><text:span text:style-name="T19">4096</text:span><text:span text:style-name="T19">” to reset to default priority</text:span></text:p>
      <text:p text:style-name="P16">Expec<text:span text:style-name="T20">t</text:span>ation: <text:span text:style-name="T13">previous</text:span> <text:span text:style-name="T13">STP priority of 4096 is removed and priority becomes </text:span><text:span text:style-name="T21">default</text:span><text:span text:style-name="T13"> 32768</text:span></text:p>
      <text:p text:style-name="P17"><text:span text:style-name="T6">Outcome:</text:span> Success</text:p>
      <text:p text:style-name="P18"/>
      <text:p text:style-name="P17"><text:span text:style-name="T22">Test 2.</text:span><text:span text:style-name="T4">4</text:span><text:span text:style-name="T22"> </text:span>– use “no span vlan 1 priority” to reset priority back to default to see if the priority number is needed to reset</text:p>
      <text:p text:style-name="P19">Expec<text:span text:style-name="T20">t</text:span>ation: <text:span text:style-name="T13">previous</text:span> <text:span text:style-name="T13">STP priority of 4096 is removed and priority becomes </text:span><text:span text:style-name="T21">default</text:span><text:span text:style-name="T13"> 32768</text:span></text:p>
      <text:p text:style-name="P17"><text:span text:style-name="T6">Outcome:</text:span> Success</text:p>
      <text:p text:style-name="P18"/>
      <text:p text:style-name="P20"><text:span text:style-name="T23">Test 2.</text:span><text:span text:style-name="T24">5</text:span> <text:span text:style-name="T18">– use “no span vlan 1 root” to reset priority to default</text:span></text:p>
      <text:p text:style-name="P19">Exp<text:span text:style-name="T20">e</text:span>ctation: <text:span text:style-name="T13">previous</text:span> <text:span text:style-name="T13">STP priority of 4096 is removed and priority becomes </text:span><text:span text:style-name="T21">default</text:span><text:span text:style-name="T13"> 32768</text:span></text:p>
      <text:p text:style-name="P17"><text:span text:style-name="T6">Outcome:</text:span> Success</text:p>
      <text:p text:style-name="P21"/>
      <text:p text:style-name="P22"><text:span text:style-name="T1">Test 3: </text:span><text:span text:style-name="T25">Set switch 1 to root bridge using root command</text:span></text:p>
      <text:p text:style-name="P23"><text:span text:style-name="T26">Test 3.1</text:span><text:span text:style-name="T20"> - </text:span>Set Switch 1 to root bridge using “span vlan 1 root primary” command</text:p>
      <text:p text:style-name="P24">Expec<text:span text:style-name="T20">t</text:span>ation: <text:span text:style-name="T27">Switch 1 will become root bridge by setting it’s own priority to lower than </text:span><text:span text:style-name="T28">any other switch (</text:span><text:span text:style-name="T27">Switch 2</text:span><text:span text:style-name="T28"> in this test) priority</text:span></text:p>
      <text:p text:style-name="P25"><text:span text:style-name="T6">Outcome:</text:span><text:span text:style-name="T13"> Success, </text:span><text:span text:style-name="T29">switch automatically set it’s priority to </text:span>24577 <text:span text:style-name="T30">which is lower than 32768 making it root bridge</text:span></text:p>
      <text:p text:style-name="P25"/>
      <text:p text:style-name="P26"><text:soft-page-break/><text:span text:style-name="T2">Test 4:</text:span> <text:span text:style-name="T31">Set switch 2 priority as 4096 to see who becomes root bridge</text:span></text:p>
      <text:p text:style-name="P27"><text:span text:style-name="T22">Test 4.1</text:span> - used “span vlan 1 pri 4096” on switch 2 to set priority lower than vlan 1</text:p>
      <text:p text:style-name="P28"><text:span text:style-name="T6">Outcome</text:span>: Switch 2 becomes root bridge because it’s priority is lower than switch 1’<text:span text:style-name="T30">s 24577</text:span></text:p>
      <text:p text:style-name="P29"><text:span text:style-name="T32">Reasoning</text:span><text:span text:style-name="T33">: Configuring a switch using the “root primary” command only does a one time </text:span><text:span text:style-name="T34">check and </text:span><text:span text:style-name="T33">c</text:span><text:span text:style-name="T34">alculation for setting priority, it does not setup a continuous check to always make lowest possible priority in attempt to stay root bridge.</text:span></text:p>
      <text:p text:style-name="P27"/>
      <text:p text:style-name="P27"><text:span text:style-name="T2">Test 5:</text:span> Set both switch 1 and switch 2 priority of 0 and see who becomes root bridge</text:p>
      <text:p text:style-name="P27"><text:span text:style-name="T22">Test 5.1:</text:span> <text:s/>use command “span vlan 1 pri 0” on both switch 1 and 2</text:p>
      <text:p text:style-name="P27"><text:span text:style-name="T6">Expectation:</text:span> Whoever is lowest MAC Address becomes root bridge</text:p>
      <text:p text:style-name="P27"><text:span text:style-name="T6">Outcome:</text:span> Switch 1 becomes root bridge because switch 1 has a lower mac address</text:p>
      <text:p text:style-name="P30"><text:span text:style-name="T35">Reasoning:</text:span><text:span text:style-name="T36"> STP follows a [priority].[MAC Address] formula to determine who becomes root bridge. So if </text:span><text:span text:style-name="T37">[</text:span><text:span text:style-name="T36">priority</text:span><text:span text:style-name="T37">]</text:span><text:span text:style-name="T36"> is the same then it compares </text:span><text:span text:style-name="T37">[</text:span><text:span text:style-name="T36">MAC address</text:span><text:span text:style-name="T37">] and sets lowest MAC Address value as root bridge</text:span><text:span text:style-name="T36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28T15:18:21.327603500</meta:creation-date>
    <dc:date>2026-06-28T16:42:44.431877500</dc:date>
    <meta:editing-duration>PT13M44S</meta:editing-duration>
    <meta:editing-cycles>4</meta:editing-cycles>
    <meta:generator>LibreOffice/26.2.4.2$Windows_X86_64 LibreOffice_project/0229ac93fcf0d7cbc6376066c6f35021cef002dc</meta:generator>
    <meta:document-statistic meta:table-count="0" meta:image-count="0" meta:object-count="0" meta:page-count="2" meta:paragraph-count="38" meta:word-count="579" meta:character-count="3340" meta:non-whitespace-character-count="2793"/>
  </office:meta>
</office:document-meta>
</file>