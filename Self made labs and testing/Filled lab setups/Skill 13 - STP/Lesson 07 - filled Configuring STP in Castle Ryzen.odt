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e807" officeooo:paragraph-rsid="0014e807"/>
    </style:style>
    <style:style style:name="P2" style:family="paragraph" style:parent-style-name="Standard">
      <style:text-properties officeooo:rsid="00391803" officeooo:paragraph-rsid="00391803"/>
    </style:style>
    <style:style style:name="P3" style:family="paragraph" style:parent-style-name="Standard">
      <style:text-properties fo:color="#bf0041" loext:opacity="100%" fo:font-weight="normal" officeooo:rsid="002949ab" officeooo:paragraph-rsid="003b777c" style:font-weight-asian="normal" style:font-weight-complex="normal"/>
    </style:style>
    <style:style style:name="P4" style:family="paragraph" style:parent-style-name="Standard">
      <style:text-properties fo:color="#ff4000" loext:opacity="100%" fo:font-weight="bold" officeooo:rsid="0014e807" officeooo:paragraph-rsid="0014e807" style:font-weight-asian="bold" style:font-weight-complex="bold"/>
    </style:style>
    <style:style style:name="P5" style:family="paragraph" style:parent-style-name="Standard">
      <style:text-properties fo:color="#000000" loext:opacity="100%" fo:font-weight="normal" officeooo:rsid="0014e807" officeooo:paragraph-rsid="0014e807" style:font-weight-asian="normal" style:font-weight-complex="normal"/>
    </style:style>
    <style:style style:name="P6" style:family="paragraph" style:parent-style-name="Standard">
      <style:text-properties fo:color="#000000" loext:opacity="100%" fo:font-weight="normal" officeooo:rsid="00150a71" officeooo:paragraph-rsid="00150a71" style:font-weight-asian="normal" style:font-weight-complex="normal"/>
    </style:style>
    <style:style style:name="P7" style:family="paragraph" style:parent-style-name="Standard">
      <style:text-properties officeooo:paragraph-rsid="00184f45"/>
    </style:style>
    <style:style style:name="P8" style:family="paragraph" style:parent-style-name="Standard">
      <style:text-properties fo:color="#800080" loext:opacity="100%" fo:font-weight="bold" officeooo:rsid="00150a71" officeooo:paragraph-rsid="00184f45" style:font-weight-asian="bold" style:font-weight-complex="bold"/>
    </style:style>
    <style:style style:name="P9" style:family="paragraph" style:parent-style-name="Standard" style:list-style-name="L1">
      <style:text-properties officeooo:paragraph-rsid="00184f45"/>
    </style:style>
    <style:style style:name="P10" style:family="paragraph" style:parent-style-name="Standard" style:list-style-name="L1">
      <style:text-properties fo:color="#800080" loext:opacity="100%" fo:font-weight="bold" officeooo:rsid="00167f36" officeooo:paragraph-rsid="00167f36" style:font-weight-asian="bold" style:font-weight-complex="bold"/>
    </style:style>
    <style:style style:name="P11" style:family="paragraph" style:parent-style-name="Standard" style:list-style-name="L1">
      <style:text-properties fo:color="#000000" loext:opacity="100%" officeooo:rsid="00167f36" officeooo:paragraph-rsid="00184f45"/>
    </style:style>
    <style:style style:name="P12" style:family="paragraph" style:parent-style-name="Standard">
      <style:text-properties fo:color="#000000" loext:opacity="100%" fo:font-weight="normal" officeooo:rsid="00167f36" officeooo:paragraph-rsid="00167f36" style:font-weight-asian="normal" style:font-weight-complex="normal"/>
    </style:style>
    <style:style style:name="P13" style:family="paragraph" style:parent-style-name="Standard">
      <style:text-properties fo:color="#000000" loext:opacity="100%" fo:font-weight="normal" officeooo:rsid="001f9930" officeooo:paragraph-rsid="001f9930" style:font-weight-asian="normal" style:font-weight-complex="normal"/>
    </style:style>
    <style:style style:name="P14" style:family="paragraph" style:parent-style-name="Standard">
      <style:text-properties fo:color="#000000" loext:opacity="100%" fo:font-weight="normal" officeooo:rsid="001a1ecf" officeooo:paragraph-rsid="001a1ecf" style:font-weight-asian="normal" style:font-weight-complex="normal"/>
    </style:style>
    <style:style style:name="P15" style:family="paragraph" style:parent-style-name="Standard">
      <style:text-properties fo:color="#000000" loext:opacity="100%" fo:font-weight="normal" officeooo:rsid="001b3034" officeooo:paragraph-rsid="001b3034" style:font-weight-asian="normal" style:font-weight-complex="normal"/>
    </style:style>
    <style:style style:name="P16" style:family="paragraph" style:parent-style-name="Standard" style:list-style-name="L2">
      <style:text-properties fo:color="#000000" loext:opacity="100%" fo:font-weight="normal" officeooo:rsid="001cc2ef" officeooo:paragraph-rsid="001cc2ef" style:font-weight-asian="normal" style:font-weight-complex="normal"/>
    </style:style>
    <style:style style:name="P17" style:family="paragraph" style:parent-style-name="Standard" style:list-style-name="L2">
      <style:text-properties fo:color="#000000" loext:opacity="100%" officeooo:rsid="001cc2ef" officeooo:paragraph-rsid="001cc2ef"/>
    </style:style>
    <style:style style:name="P18" style:family="paragraph" style:parent-style-name="Standard" style:list-style-name="L2">
      <style:text-properties fo:color="#000000" loext:opacity="100%" officeooo:rsid="001e94c9" officeooo:paragraph-rsid="001e94c9"/>
    </style:style>
    <style:style style:name="P19" style:family="paragraph" style:parent-style-name="Standard">
      <style:text-properties fo:color="#000000" loext:opacity="100%" fo:font-weight="normal" officeooo:rsid="001b3034" officeooo:paragraph-rsid="0022601c" style:font-weight-asian="normal" style:font-weight-complex="normal"/>
    </style:style>
    <style:style style:name="P20" style:family="paragraph" style:parent-style-name="Standard">
      <style:text-properties fo:color="#000000" loext:opacity="100%" fo:font-weight="normal" officeooo:rsid="0022601c" officeooo:paragraph-rsid="0022601c" style:font-weight-asian="normal" style:font-weight-complex="normal"/>
    </style:style>
    <style:style style:name="P21" style:family="paragraph" style:parent-style-name="Standard" style:list-style-name="L3">
      <style:text-properties fo:color="#000000" loext:opacity="100%" fo:font-weight="normal" officeooo:rsid="001cc2ef" officeooo:paragraph-rsid="001e94c9" style:font-weight-asian="normal" style:font-weight-complex="normal"/>
    </style:style>
    <style:style style:name="P22" style:family="paragraph" style:parent-style-name="Standard" style:list-style-name="L3">
      <style:text-properties fo:color="#000000" loext:opacity="100%" fo:font-weight="normal" officeooo:rsid="001e94c9" officeooo:paragraph-rsid="001e94c9" style:font-weight-asian="normal" style:font-weight-complex="normal"/>
    </style:style>
    <style:style style:name="P23" style:family="paragraph" style:parent-style-name="Standard">
      <style:text-properties fo:color="#000000" loext:opacity="100%" fo:font-weight="normal" officeooo:rsid="001e94c9" officeooo:paragraph-rsid="001e94c9" style:font-weight-asian="normal" style:font-weight-complex="normal"/>
    </style:style>
    <style:style style:name="P24" style:family="paragraph" style:parent-style-name="Standard">
      <style:text-properties fo:color="#000000" loext:opacity="100%" fo:font-weight="normal" officeooo:rsid="0027605a" officeooo:paragraph-rsid="001e94c9" style:font-weight-asian="normal" style:font-weight-complex="normal"/>
    </style:style>
    <style:style style:name="P25" style:family="paragraph" style:parent-style-name="Standard">
      <style:text-properties fo:color="#000000" loext:opacity="100%" fo:font-weight="normal" officeooo:rsid="0027605a" officeooo:paragraph-rsid="0027605a" style:font-weight-asian="normal" style:font-weight-complex="normal"/>
    </style:style>
    <style:style style:name="P26" style:family="paragraph" style:parent-style-name="Standard" style:list-style-name="L4">
      <style:text-properties fo:color="#000000" loext:opacity="100%" fo:font-weight="normal" officeooo:rsid="0027605a" officeooo:paragraph-rsid="0027605a" style:font-weight-asian="normal" style:font-weight-complex="normal"/>
    </style:style>
    <style:style style:name="P27" style:family="paragraph" style:parent-style-name="Standard" style:list-style-name="L4">
      <style:text-properties fo:color="#000000" loext:opacity="100%" officeooo:rsid="0027605a" officeooo:paragraph-rsid="002949ab"/>
    </style:style>
    <style:style style:name="P28" style:family="paragraph" style:parent-style-name="Standard" style:list-style-name="L4">
      <style:text-properties fo:color="#000000" loext:opacity="100%" fo:font-weight="normal" officeooo:rsid="002949ab" officeooo:paragraph-rsid="002949ab" style:font-weight-asian="normal" style:font-weight-complex="normal"/>
    </style:style>
    <style:style style:name="P29" style:family="paragraph" style:parent-style-name="Standard">
      <style:text-properties fo:color="#000000" loext:opacity="100%" fo:font-weight="normal" officeooo:rsid="00391803" officeooo:paragraph-rsid="00391803" style:font-weight-asian="normal" style:font-weight-complex="normal"/>
    </style:style>
    <style:style style:name="P30" style:family="paragraph" style:parent-style-name="Standard">
      <style:text-properties fo:color="#00a933" loext:opacity="100%" fo:font-weight="bold" officeooo:rsid="0014e807" officeooo:paragraph-rsid="002949ab" style:font-weight-asian="bold" style:font-weight-complex="bold"/>
    </style:style>
    <style:style style:name="P31" style:family="paragraph" style:parent-style-name="Standard">
      <style:text-properties fo:color="#bf0041" loext:opacity="100%" fo:font-weight="normal" officeooo:rsid="002949ab" officeooo:paragraph-rsid="002b0d4d" style:font-weight-asian="normal" style:font-weight-complex="normal"/>
    </style:style>
    <style:style style:name="P32" style:family="paragraph" style:parent-style-name="Standard" style:list-style-name="L5">
      <style:text-properties officeooo:paragraph-rsid="002b0d4d"/>
    </style:style>
    <style:style style:name="P33" style:family="paragraph" style:parent-style-name="Standard" style:list-style-name="L5">
      <style:text-properties fo:color="#000000" loext:opacity="100%" fo:font-weight="normal" officeooo:rsid="002949ab" officeooo:paragraph-rsid="002b0d4d" style:font-weight-asian="normal" style:font-weight-complex="normal"/>
    </style:style>
    <style:style style:name="P34" style:family="paragraph" style:parent-style-name="Standard">
      <style:text-properties fo:color="#000000" loext:opacity="100%" fo:font-weight="normal" officeooo:rsid="0034c4f7" officeooo:paragraph-rsid="0034c4f7" style:font-weight-asian="normal" style:font-weight-complex="normal"/>
    </style:style>
    <style:style style:name="P35" style:family="paragraph" style:parent-style-name="Standard">
      <style:text-properties fo:color="#000000" loext:opacity="100%" officeooo:rsid="0034c4f7" officeooo:paragraph-rsid="0034c4f7"/>
    </style:style>
    <style:style style:name="P36" style:family="paragraph" style:parent-style-name="Standard">
      <style:text-properties fo:color="#000000" loext:opacity="100%" officeooo:rsid="0034c4f7" officeooo:paragraph-rsid="0034d1c1"/>
    </style:style>
    <style:style style:name="P37" style:family="paragraph" style:parent-style-name="Standard">
      <style:text-properties fo:color="#000000" loext:opacity="100%" fo:font-weight="normal" officeooo:rsid="0036f602" officeooo:paragraph-rsid="0036f602" style:font-weight-asian="normal" style:font-weight-complex="normal"/>
    </style:style>
    <style:style style:name="P38" style:family="paragraph" style:parent-style-name="Standard">
      <style:text-properties fo:color="#800080" loext:opacity="100%" fo:font-weight="bold" officeooo:rsid="0037e2c9" officeooo:paragraph-rsid="0037e2c9" style:font-weight-asian="bold" style:font-weight-complex="bold"/>
    </style:style>
    <style:style style:name="P39" style:family="paragraph" style:parent-style-name="Standard" style:list-style-name="L6">
      <style:text-properties fo:color="#000000" loext:opacity="100%" fo:font-weight="normal" officeooo:rsid="0037e2c9" officeooo:paragraph-rsid="0037e2c9" style:font-weight-asian="normal" style:font-weight-complex="normal"/>
    </style:style>
    <style:style style:name="P40" style:family="paragraph" style:parent-style-name="Standard" style:list-style-name="L6">
      <style:text-properties fo:color="#000000" loext:opacity="100%" fo:font-weight="normal" officeooo:rsid="00382d8a" officeooo:paragraph-rsid="00382d8a" style:font-weight-asian="normal" style:font-weight-complex="normal"/>
    </style:style>
    <style:style style:name="P41" style:family="paragraph" style:parent-style-name="Standard" style:list-style-name="L6">
      <style:text-properties fo:color="#000000" loext:opacity="100%" fo:font-weight="normal" officeooo:rsid="00391803" officeooo:paragraph-rsid="00391803" style:font-weight-asian="normal" style:font-weight-complex="normal"/>
    </style:style>
    <style:style style:name="P42" style:family="paragraph" style:parent-style-name="Standard">
      <style:text-properties fo:color="#000000" loext:opacity="100%" fo:font-weight="normal" officeooo:rsid="003a40db" officeooo:paragraph-rsid="003a40db" style:font-weight-asian="normal" style:font-weight-complex="normal"/>
    </style:style>
    <style:style style:name="P43" style:family="paragraph" style:parent-style-name="Standard">
      <style:text-properties fo:color="#bf0041" loext:opacity="100%" fo:font-weight="normal" officeooo:rsid="002949ab" officeooo:paragraph-rsid="003ce411" style:font-weight-asian="normal" style:font-weight-complex="normal"/>
    </style:style>
    <style:style style:name="T1" style:family="text">
      <style:text-properties fo:color="#ff0000" loext:opacity="100%" fo:font-weight="bold" style:font-weight-asian="bold" style:font-weight-complex="bold"/>
    </style:style>
    <style:style style:name="T2" style:family="text">
      <style:text-properties fo:color="#ff0000" loext:opacity="100%" fo:font-weight="bold" officeooo:rsid="0036f602" style:font-weight-asian="bold" style:font-weight-complex="bold"/>
    </style:style>
    <style:style style:name="T3" style:family="text">
      <style:text-properties fo:color="#ff0000" loext:opacity="100%"/>
    </style:style>
    <style:style style:name="T4" style:family="text">
      <style:text-properties fo:font-weight="bold" style:font-weight-asian="bold" style:font-weight-complex="bold"/>
    </style:style>
    <style:style style:name="T5" style:family="text">
      <style:text-properties officeooo:rsid="00150a71"/>
    </style:style>
    <style:style style:name="T6" style:family="text">
      <style:text-properties officeooo:rsid="00360fee"/>
    </style:style>
    <style:style style:name="T7" style:family="text">
      <style:text-properties fo:color="#800080" loext:opacity="100%" fo:font-weight="bold" style:font-weight-asian="bold" style:font-weight-complex="bold"/>
    </style:style>
    <style:style style:name="T8" style:family="text">
      <style:text-properties fo:color="#ff8000" loext:opacity="100%" fo:font-weight="bold" style:font-weight-asian="bold" style:font-weight-complex="bold"/>
    </style:style>
    <style:style style:name="T9" style:family="text">
      <style:text-properties fo:color="#00a933" loext:opacity="100%" fo:font-weight="bold" style:font-weight-asian="bold" style:font-weight-complex="bold"/>
    </style:style>
    <style:style style:name="T10" style:family="text">
      <style:text-properties fo:font-weight="bold" officeooo:rsid="002b0d4d" style:font-weight-asian="bold" style:font-weight-complex="bold"/>
    </style:style>
    <style:style style:name="T11" style:family="text">
      <style:text-properties fo:color="#000000" loext:opacity="100%" officeooo:rsid="003b777c"/>
    </style:style>
    <style:style style:name="T12" style:family="text">
      <style:text-properties fo:color="#000000" loext:opacity="100%" officeooo:rsid="003ce411"/>
    </style:style>
    <style:style style:name="T13" style:family="text">
      <style:text-properties fo:color="#000000" loext:opacity="100%" fo:font-weight="normal" style:font-weight-asian="normal" style:font-weight-complex="normal"/>
    </style:style>
    <style:style style:name="T14" style:family="text">
      <style:text-properties fo:color="#000000" loext:opacity="100%" fo:font-weight="normal" officeooo:rsid="00360fee" style:font-weight-asian="normal" style:font-weight-complex="normal"/>
    </style:style>
    <style:style style:name="T15" style:family="text">
      <style:text-properties fo:color="#000000" loext:opacity="100%" fo:font-weight="normal" officeooo:rsid="001a1ecf" style:font-weight-asian="normal" style:font-weight-complex="normal"/>
    </style:style>
    <style:style style:name="T16" style:family="text">
      <style:text-properties fo:color="#158466" loext:opacity="100%" fo:font-weight="bold" style:font-weight-asian="bold" style:font-weight-complex="bold"/>
    </style:style>
    <style:style style:name="T17" style:family="text">
      <style:text-properties officeooo:rsid="001b3034"/>
    </style:style>
    <style:style style:name="T18" style:family="text">
      <style:text-properties officeooo:rsid="0014e807"/>
    </style:style>
    <style:style style:name="T19" style:family="text">
      <style:text-properties fo:color="#2a6099" loext:opacity="100%" fo:font-weight="bold" officeooo:rsid="00150a71" style:font-weight-asian="bold" style:font-weight-complex="bold"/>
    </style:style>
    <style:style style:name="T20" style:family="text">
      <style:text-properties fo:color="#2a6099" loext:opacity="100%" fo:font-weight="bold" officeooo:rsid="00167f36" style:font-weight-asian="bold" style:font-weight-complex="bold"/>
    </style:style>
    <style:style style:name="T21" style:family="text">
      <style:text-properties fo:color="#000000" loext:opacity="100%" fo:font-weight="bold" officeooo:rsid="00150a71" style:font-weight-asian="bold" style:font-weight-complex="bold"/>
    </style:style>
    <style:style style:name="T22" style:family="text">
      <style:text-properties fo:color="#000000" loext:opacity="100%" fo:font-weight="normal" officeooo:rsid="00150a71" style:font-weight-asian="normal" style:font-weight-complex="normal"/>
    </style:style>
    <style:style style:name="T23" style:family="text">
      <style:text-properties fo:color="#000000" loext:opacity="100%" fo:font-weight="normal" officeooo:rsid="001bbedb" style:font-weight-asian="normal" style:font-weight-complex="normal"/>
    </style:style>
    <style:style style:name="T24" style:family="text">
      <style:text-properties fo:color="#000000" loext:opacity="100%" fo:font-weight="normal" officeooo:rsid="00167f36" style:font-weight-asian="normal" style:font-weight-complex="normal"/>
    </style:style>
    <style:style style:name="T25" style:family="text">
      <style:text-properties fo:color="#000000" loext:opacity="100%" fo:font-weight="bold" officeooo:rsid="00167f36" style:font-weight-asian="bold" style:font-weight-complex="bold"/>
    </style:style>
    <style:style style:name="T26" style:family="text">
      <style:text-properties fo:color="#000000" loext:opacity="100%"/>
    </style:style>
    <style:style style:name="T27" style:family="text">
      <style:text-properties fo:font-weight="normal" style:font-weight-asian="normal" style:font-weight-complex="normal"/>
    </style:style>
    <style:style style:name="T28" style:family="text">
      <style:text-properties officeooo:rsid="001cc2ef"/>
    </style:style>
    <style:style style:name="T29" style:family="text">
      <style:text-properties fo:font-weight="normal" officeooo:rsid="00181325" style:font-weight-asian="normal" style:font-weight-complex="normal"/>
    </style:style>
    <style:style style:name="T30" style:family="text">
      <style:text-properties fo:font-weight="bold" officeooo:rsid="00181325" style:font-weight-asian="bold" style:font-weight-complex="bold"/>
    </style:style>
    <style:style style:name="T31" style:family="text">
      <style:text-properties officeooo:rsid="00181325"/>
    </style:style>
    <style:style style:name="T32" style:family="text">
      <style:text-properties fo:color="#2a6099" loext:opacity="100%" fo:font-weight="bold" style:font-weight-asian="bold" style:font-weight-complex="bold"/>
    </style:style>
    <style:style style:name="T33" style:family="text">
      <style:text-properties officeooo:rsid="001e94c9"/>
    </style:style>
    <style:style style:name="T34" style:family="text">
      <style:text-properties fo:color="#bf0041" loext:opacity="100%" fo:font-weight="bold" style:font-weight-asian="bold" style:font-weight-complex="bold"/>
    </style:style>
    <style:style style:name="T35" style:family="text">
      <style:text-properties fo:color="#bf0041" loext:opacity="100%" fo:font-weight="bold" officeooo:rsid="00331e37" style:font-weight-asian="bold" style:font-weight-complex="bold"/>
    </style:style>
    <style:style style:name="T36" style:family="text">
      <style:text-properties officeooo:rsid="0025cdd2"/>
    </style:style>
    <style:style style:name="T37" style:family="text">
      <style:text-properties fo:color="#ff4000" loext:opacity="100%" fo:font-weight="bold" style:font-weight-asian="bold" style:font-weight-complex="bold"/>
    </style:style>
    <style:style style:name="T38" style:family="text">
      <style:text-properties fo:color="#800080" loext:opacity="100%" fo:font-weight="bold" officeooo:rsid="001cc2ef" style:font-weight-asian="bold" style:font-weight-complex="bold"/>
    </style:style>
    <style:style style:name="T39" style:family="text">
      <style:text-properties officeooo:rsid="002425a8"/>
    </style:style>
    <style:style style:name="T40" style:family="text">
      <style:text-properties officeooo:rsid="0034964b"/>
    </style:style>
    <style:style style:name="T41" style:family="text">
      <style:text-properties officeooo:rsid="002949ab"/>
    </style:style>
    <style:style style:name="T42" style:family="text">
      <style:text-properties fo:color="#000000" loext:opacity="100%" fo:font-weight="normal" officeooo:rsid="002949ab" style:font-weight-asian="normal" style:font-weight-complex="normal"/>
    </style:style>
    <style:style style:name="T43" style:family="text">
      <style:text-properties fo:color="#000000" loext:opacity="100%" fo:font-weight="normal" officeooo:rsid="002d4423" style:font-weight-asian="normal" style:font-weight-complex="normal"/>
    </style:style>
    <style:style style:name="T44" style:family="text">
      <style:text-properties fo:color="#000000" loext:opacity="100%" fo:font-weight="normal" officeooo:rsid="002b0d4d" style:font-weight-asian="normal" style:font-weight-complex="normal"/>
    </style:style>
    <style:style style:name="T45" style:family="text">
      <style:text-properties fo:color="#000000" loext:opacity="100%" fo:font-weight="normal" officeooo:rsid="002f1cdb" style:font-weight-asian="normal" style:font-weight-complex="normal"/>
    </style:style>
    <style:style style:name="T46" style:family="text">
      <style:text-properties fo:color="#000000" loext:opacity="100%" fo:font-weight="normal" officeooo:rsid="002f3a9e" style:font-weight-asian="normal" style:font-weight-complex="normal"/>
    </style:style>
    <style:style style:name="T47" style:family="text">
      <style:text-properties officeooo:rsid="002d4423"/>
    </style:style>
    <style:style style:name="T48" style:family="text">
      <style:text-properties officeooo:rsid="002f1cdb"/>
    </style:style>
    <style:style style:name="T49" style:family="text">
      <style:text-properties officeooo:rsid="002f3a9e"/>
    </style:style>
    <style:style style:name="T50" style:family="text">
      <style:text-properties fo:color="#bf0041" loext:opacity="100%"/>
    </style:style>
    <style:style style:name="T51" style:family="text">
      <style:text-properties officeooo:rsid="00382d8a"/>
    </style:style>
    <style:style style:name="T52" style:family="text">
      <style:text-properties fo:font-weight="bold" officeooo:rsid="00382d8a" style:font-weight-asian="bold" style:font-weight-complex="bold"/>
    </style:style>
    <style:style style:name="T53" style:family="text">
      <style:text-properties fo:font-weight="bold" officeooo:rsid="00391803" style:font-weight-asian="bold" style:font-weight-complex="bold"/>
    </style:style>
    <style:style style:name="T54" style:family="text">
      <style:text-properties officeooo:rsid="003a40db"/>
    </style:style>
    <style:style style:name="T55" style:family="text">
      <style:text-properties officeooo:rsid="003ad0af"/>
    </style:style>
    <style:style style:name="T56" style:family="text">
      <style:text-properties fo:color="#000000" loext:opacity="100%" officeooo:rsid="003ceb8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1">Issue </text:span><text:span text:style-name="T2">1</text:span><text:span text:style-name="T3">:</text:span> When Issuing command “<text:span text:style-name="T4">spanning-tree vlan 1,10,20, root primary</text:span>” <text:span text:style-name="T5">on</text:span> <text:span text:style-name="T6">cafe s</text:span>witch 1 <text:span text:style-name="T5">to </text:span>set it as root bridge for vlan 1, 10, 20 it states “Command rejected: Bad VLAN list”</text:p>
      <text:p text:style-name="P1"><text:span text:style-name="T7">Investigation</text:span>: double checking syntax shows an extra comma at end of 20</text:p>
      <text:p text:style-name="P2"><text:span text:style-name="T8">Cause:</text:span> extra comma was placed at end of 20 in command making command believe that vlan list was incomplete</text:p>
      <text:p text:style-name="P1"><text:span text:style-name="T9">Solution</text:span>: remove extra comma</text:p>
      <text:p text:style-name="P3"><text:span text:style-name="T4">Thought</text:span><text:span text:style-name="T10">s</text:span><text:span text:style-name="T4"> </text:span><text:span text:style-name="T10">on</text:span><text:span text:style-name="T4"> reason </text:span><text:span text:style-name="T10">for issue and solution</text:span>: <text:span text:style-name="T11">Even though the command was followed, because there was a comma the command expected another vlan number. The command for vlans must end on a number so there is no further issues caused by users thinking they put in a number they actually didn’t (or coding just expects a number at end so it doesn’t end in a weird coding loop). </text:span><text:span text:style-name="T12">Also, always double check syntax first because not all cisco devices accept same syntax and may not take what you thought was correct way.</text:span></text:p>
      <text:p text:style-name="P1"/>
      <text:p text:style-name="P4">Test 1: <text:span text:style-name="T13">Issue root primary command for vlan that does not exist yet on </text:span><text:span text:style-name="T14">cafe </text:span><text:span text:style-name="T13">switch </text:span><text:span text:style-name="T15">1</text:span></text:p>
      <text:p text:style-name="P5"><text:span text:style-name="T16">Test 1.1:</text:span> Issue command “<text:span text:style-name="T4">spanning-tree vlan 30 root primary</text:span>” <text:span text:style-name="T17">on switch 1 </text:span>to see what happens</text:p>
      <text:p text:style-name="P6"><text:span text:style-name="T4">Expectation: </text:span>Error message stating “<text:span text:style-name="T18">Command rejected: Bad VLAN list”</text:span></text:p>
      <text:p text:style-name="P7"><text:span text:style-name="T19">Outcome </text:span><text:span text:style-name="T20">1</text:span><text:span text:style-name="T21">:</text:span><text:span text:style-name="T22"> Command taken with no warnings or issues </text:span><text:span text:style-name="T23">stated</text:span></text:p>
      <text:p text:style-name="P8">Investigation:</text:p>
      <text:list text:style-name="L1">
        <text:list-item>
          <text:p text:style-name="P9"><text:span text:style-name="T24">using command “</text:span><text:span text:style-name="T25">Show spanning-tree</text:span><text:span text:style-name="T24">” shows Vlans 1, 10 and 20 have been set to lowest priority of 24576 + sys-id-extension # but does not show Vlan 30.</text:span></text:p>
        </text:list-item>
        <text:list-item>
          <text:p text:style-name="P10"><text:span text:style-name="T13">using command “</text:span><text:span text:style-name="T26">show vlan</text:span><text:span text:style-name="T13">” only shows vlans 1, 10 and 20 listed as active does not show Vlan 30</text:span></text:p>
        </text:list-item>
        <text:list-item>
          <text:p text:style-name="P11"><text:span text:style-name="T27">Creating Vlan 30 on switch 1, then issuing “</text:span><text:span text:style-name="T4">show vlan</text:span><text:span text:style-name="T27">” to verify vlan 30 is active then using “</text:span><text:span text:style-name="T4">Show span</text:span><text:span text:style-name="T27">” shows Vlan 30 priority is set to 24576 + </text:span>sys-id-ext <text:span text:style-name="T28">#</text:span></text:p>
        </text:list-item>
        <text:list-item>
          <text:p text:style-name="P11"><text:span text:style-name="T29"><text:s/>using “</text:span><text:span text:style-name="T30">show run | include span</text:span><text:span text:style-name="T29">” lists “</text:span><text:span text:style-name="T31">spanning-tree vlan 1,10,20,30 priority 24576” </text:span></text:p>
        </text:list-item>
      </text:list>
      <text:p text:style-name="P12"><text:span text:style-name="T32">Outcome 2: </text:span>Even though vlan <text:span text:style-name="T31">30</text:span> was not created yet <text:span text:style-name="T31">on any switch</text:span> the switch automatically set <text:span text:style-name="T31">the priority based on it’s default value </text:span><text:span text:style-name="T33">of 32768</text:span></text:p>
      <text:p text:style-name="P13"><text:span text:style-name="T34">Thought</text:span><text:span text:style-name="T35">s</text:span><text:span text:style-name="T34"> on reason for outcome</text:span>: Since no other switch in the network had vlan 30 created yet it has nothing to compare to so there for can only guess/calculate against a default value <text:span text:style-name="T36">of 32768</text:span>.</text:p>
      <text:p text:style-name="P12"/>
      <text:p text:style-name="P14"><text:span text:style-name="T37">Test 2:</text:span> <text:span text:style-name="T17">Issue root primary command for vlan 30 that does not exist on </text:span><text:span text:style-name="T6">cafe </text:span><text:span text:style-name="T17">switch 2 but does on </text:span><text:span text:style-name="T6">cafe</text:span><text:span text:style-name="T17"> switch 1 </text:span><text:span text:style-name="T28">and see what happens</text:span></text:p>
      <text:p text:style-name="P15"><text:span text:style-name="T16">Test 2.1</text:span>: Issue command <text:span text:style-name="T18">“spanning-tree vlan 30 root primary” </text:span>on switch 2</text:p>
      <text:p text:style-name="P15"><text:span text:style-name="T4">Expectation:</text:span> <text:span text:style-name="T28">Command is taken, Switch 2 sees that VLAN 30 is already created on a switch on the network and sets priority accordingly to become root bridge but does not create Vlan30 by default. Thus not included for root bridge elections until vlan 30 is created on switch</text:span></text:p>
      <text:p text:style-name="P15"><text:span text:style-name="T7">In</text:span><text:span text:style-name="T38">vestigation</text:span><text:span text:style-name="T28">:</text:span></text:p>
      <text:list text:style-name="L2">
        <text:list-item>
          <text:p text:style-name="P16"><text:s/>“<text:span text:style-name="T4">Show span</text:span>” shows Vlans 1, 10 and 20 and vlan 30 is missing as expected</text:p>
        </text:list-item>
        <text:list-item>
          <text:p text:style-name="P16">“<text:span text:style-name="T4">show vlan</text:span>” shows Vlans 1, 10 and 20 as active but no Vlan 30 listed as expected</text:p>
        </text:list-item>
        <text:list-item>
          <text:p text:style-name="P17"><text:span text:style-name="T27">Creating Vlan 30 on switch 2, then issuing “</text:span><text:span text:style-name="T4">show vlan</text:span><text:span text:style-name="T27">” to verify vlan 30 is active, then using “</text:span><text:span text:style-name="T4">show span</text:span><text:span text:style-name="T27">” shows priority is set to 24576 + </text:span>sys-id-ext <text:span text:style-name="T39">and is NOT root bridge because both switch 1 and 2 priorities are the same and switch 1 Mac-address is lower.</text:span></text:p>
        </text:list-item>
        <text:list-item>
          <text:p text:style-name="P18">Using command “<text:span text:style-name="T30">show run | include span</text:span><text:span text:style-name="T31">” </text:span>list “spanning-tree vlan 30 priority 24576”</text:p>
        </text:list-item>
      </text:list>
      <text:p text:style-name="P19"><text:span text:style-name="T32">Outcome</text:span>: <text:span text:style-name="T33">Using command “</text:span><text:span text:style-name="T30">show run | include span</text:span><text:span text:style-name="T31">” </text:span><text:span text:style-name="T33">list “spanning-tree vlan 30 priority 24576”</text:span></text:p>
      <text:p text:style-name="P20"><text:span text:style-name="T34">Thoughts on reason for outcome</text:span>:</text:p>
      <text:list text:style-name="L3">
        <text:list-item>
          <text:p text:style-name="P21">Even though Vlan 30 already existed on the network <text:span text:style-name="T33">since </text:span><text:span text:style-name="T40">the </text:span><text:span text:style-name="T33">switch did not already have the vlan created it could not send a BPDU </text:span><text:span text:style-name="T40">for that specific VLAN</text:span><text:span text:style-name="T33"> to determine what </text:span><text:span text:style-name="T40">real</text:span><text:span text:style-name="T33"> current lowest value is</text:span></text:p>
        </text:list-item>
        <text:list-item>
          <text:p text:style-name="P22"><text:soft-page-break/>Unless a VLAN is already created <text:span text:style-name="T36">on the switch, to participate in root bridge elections/receive BPDUs for that VLAN,</text:span> setting priority via “root primary” command only reduce<text:span text:style-name="T36">s</text:span> the value based on the default priority of 32768 not what is current lowest priority <text:span text:style-name="T36">for a given VLAN</text:span>.</text:p>
        </text:list-item>
      </text:list>
      <text:p text:style-name="P23"/>
      <text:p text:style-name="P24"/>
      <text:p text:style-name="P24"><text:span text:style-name="T1">Issue </text:span><text:span text:style-name="T2">2</text:span><text:span text:style-name="T1">:</text:span> While removing Vlan30 on both <text:span text:style-name="T6">cafe </text:span>switches to reset the lab to default settings VLAN 30 came back up on both.</text:p>
      <text:p text:style-name="P25"><text:span text:style-name="T7">Investigation</text:span>:</text:p>
      <text:list text:style-name="L4">
        <text:list-item>
          <text:p text:style-name="P26">“<text:span text:style-name="T4">show vlan</text:span>” shows VLAN30 as active and in “up up” status and protocol confirming vlan 30 was remade</text:p>
        </text:list-item>
        <text:list-item>
          <text:p text:style-name="P26">“<text:span text:style-name="T4">show ip int brief</text:span>” shows vlan 30 in “up” status and “up” protocol showing vlan 30 interface is up as well</text:p>
        </text:list-item>
        <text:list-item>
          <text:p text:style-name="P27"><text:span text:style-name="T27">using “</text:span><text:span text:style-name="T4">show vtp status</text:span><text:span text:style-name="T27">” shows “</text:span>VTP Operating Mode: Transparent” on both switches meaning VTP could not <text:span text:style-name="T41">replicate VLANS across switches</text:span> </text:p>
        </text:list-item>
        <text:list-item>
          <text:p text:style-name="P28">Reviewing commands issued to remove VLANS reveals only “no vlan 30” used</text:p>
        </text:list-item>
      </text:list>
      <text:p text:style-name="P29"><text:span text:style-name="T8">Cause:</text:span> Only one command was issued initially (final command in chain to remove vlan fully), and then when trying to remove interfaces the commands were entered in incorrect order, thus causing system to recreate Vlan on switches</text:p>
      <text:p text:style-name="P30">Solution: <text:span text:style-name="T42">First</text:span> <text:span text:style-name="T42">remove interface for vlan 30 using “no int vlan 30” before removing vlan 30 base config using “no vlan 30” </text:span><text:span text:style-name="T43">on each switch</text:span></text:p>
      <text:p text:style-name="P31"><text:span text:style-name="T4">Thought</text:span><text:span text:style-name="T10">s</text:span><text:span text:style-name="T4"> </text:span><text:span text:style-name="T10">on</text:span><text:span text:style-name="T4"> reason </text:span><text:span text:style-name="T10">for issue and solution</text:span>:</text:p>
      <text:list text:style-name="L5">
        <text:list-item>
          <text:p text:style-name="P32"><text:span text:style-name="T42">By removing the </text:span><text:span text:style-name="T44">interface </text:span><text:span text:style-name="T42">first it removes </text:span><text:span text:style-name="T43">an interface for trunking purposes (in this case both connections on Fa0/1 and Fa0/2 between switch 1 and 2 are set as trunk ports with no limits on vlans </text:span><text:span text:style-name="T45">carried</text:span><text:span text:style-name="T43">) </text:span><text:span text:style-name="T45">it effectively removes </text:span><text:span text:style-name="T46">a vlan </text:span><text:span text:style-name="T45">to be carried on a trunk on that switch </text:span><text:span text:style-name="T46">without causing issues to vlan memberships (so the switch is removed from being on that vlan but the vlan is not removed from being known/tagged for switching purposes)</text:span></text:p>
        </text:list-item>
        <text:list-item>
          <text:p text:style-name="P33">If the base s<text:span text:style-name="T47">etup is removed from a switch first </text:span><text:span text:style-name="T48">it could cause any trunk ports carrying that vlan “</text:span><text:span text:style-name="T49">interface”</text:span><text:span text:style-name="T48"> to flap because of a change in those port’s active vlan memberships. To fix the issue the switch recreates the vlan to prevent flapping.</text:span></text:p>
        </text:list-item>
      </text:list>
      <text:p text:style-name="P34"/>
      <text:p text:style-name="P34"><text:span text:style-name="T37">Test 3:</text:span> What happens if “span vlan # root primary” is used on a switch that is already root bridge with lowest priority number</text:p>
      <text:p text:style-name="P35"><text:span text:style-name="T16">Test 3.1:</text:span><text:span text:style-name="T27"> issue command <text:s/>“</text:span>span vlan 1,10,20 root primary” on <text:span text:style-name="T6">cafe </text:span>switch 1 that already has Bridge priority 24586 + sys-id-ext #</text:p>
      <text:p text:style-name="P35"><text:span text:style-name="T4">Expectation:</text:span> priority number will lower itself again even though it’s root because the command will still attempt to do 2 decrement of 4096.</text:p>
      <text:p text:style-name="P36"><text:span text:style-name="T7">Investigation:</text:span> Using “<text:span text:style-name="T4">Show span</text:span>” shows the bridge ID stayed the same</text:p>
      <text:p text:style-name="P35"><text:span text:style-name="T32">Outcome:</text:span> Priority numbers stay the same</text:p>
      <text:p text:style-name="P35"><text:span text:style-name="T34">Thoughts on reason for outcome</text:span><text:span text:style-name="T50">:</text:span> because the switch already has the lowest priority on the vlan networks it’s smart enough to know it doesn’t need to recalculate the number to become Root Bridge.</text:p>
      <text:p text:style-name="P34"/>
      <text:p text:style-name="P37"><text:span text:style-name="T1">Issue 3</text:span><text:span text:style-name="T1">:</text:span> <text:s/>loop existed on fallout shelter network between switches 1, 2 and 6</text:p>
      <text:p text:style-name="P38"><text:span text:style-name="T51">I</text:span>nvestigation:</text:p>
      <text:list text:style-name="L6">
        <text:list-item>
          <text:p text:style-name="P39">“<text:span text:style-name="T4">show </text:span><text:span text:style-name="T52">spanning-tree</text:span><text:span text:style-name="T51">” on Switch 1 shows switch is root ID and bridge ID is 4096 + sys-id-ext for all VLANs</text:span></text:p>
        </text:list-item>
        <text:list-item>
          <text:p text:style-name="P40">“<text:span text:style-name="T4">show span</text:span>” <text:s/>on switch 1shows that vlans 10, 20, 30, 40 do not show interfaces fa0/6 or 7 on list of interfaces enabled but Vlan 1 does have those interfaces enabled</text:p>
        </text:list-item>
        <text:list-item>
          <text:p text:style-name="P40">“<text:span text:style-name="T4">show int</text:span><text:span text:style-name="T53">erfaces</text:span><text:span text:style-name="T4"> trunk</text:span>” on switch 1 shows interfaces fa0/1-5 as trunk ports but not fa0/6 or 7</text:p>
        </text:list-item>
        <text:list-item>
          <text:p text:style-name="P41">“<text:span text:style-name="T4">show run</text:span>” on switch 1 shows interfaces <text:span text:style-name="T54">fa0/1-5 enabled trunk ports but </text:span>fa0/6 and 7 are not</text:p>
        </text:list-item>
      </text:list>
      <text:p text:style-name="P29"><text:soft-page-break/><text:span text:style-name="T8">Cause:</text:span> Interfaces fa0/6 and 7 are not set as trunk ports and thus are not calculated by STP for loop prevention for VLANs 10, 20, 30, or 40</text:p>
      <text:p text:style-name="P42"><text:span text:style-name="T9">Solution:</text:span> <text:span text:style-name="T55">For consistency set command “switchport mode dynamic desirable” on interfaces Fa0/6 and 7</text:span></text:p>
      <text:p text:style-name="P43"><text:span text:style-name="T4">Thought</text:span><text:span text:style-name="T10">s</text:span><text:span text:style-name="T4"> </text:span><text:span text:style-name="T10">on</text:span><text:span text:style-name="T4"> reason </text:span><text:span text:style-name="T10">for issue and solution</text:span>:<text:span text:style-name="T26"> </text:span><text:span text:style-name="T56">By default switch ports are set to switchport mode dynamic auto for determining if a port should be a trunk. Thus if no switch on either end has their port set as switchport mode dynamic desirable (if using DTP as in this lab and previous lab exercises) or manually set as switchport mode trunk (better method) then the ports stay as access ports and by default only allow default vlan traffic.</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29T21:43:13.240260100</meta:creation-date>
    <meta:generator>LibreOffice/26.2.4.2$Windows_X86_64 LibreOffice_project/0229ac93fcf0d7cbc6376066c6f35021cef002dc</meta:generator>
    <dc:date>2026-07-01T01:24:07.352896100</dc:date>
    <meta:editing-duration>PT1H49M38S</meta:editing-duration>
    <meta:editing-cycles>29</meta:editing-cycles>
    <meta:document-statistic meta:table-count="0" meta:image-count="0" meta:object-count="0" meta:page-count="3" meta:paragraph-count="54" meta:word-count="1292" meta:character-count="7215" meta:non-whitespace-character-count="5990"/>
  </office:meta>
</office:document-meta>
</file>