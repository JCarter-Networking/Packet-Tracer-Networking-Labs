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1ec5" officeooo:paragraph-rsid="00141ec5"/>
    </style:style>
    <style:style style:name="P2" style:family="paragraph" style:parent-style-name="Standard">
      <style:text-properties fo:font-weight="bold" officeooo:rsid="00141ec5" officeooo:paragraph-rsid="0016f545" style:font-weight-asian="bold" style:font-weight-complex="bold"/>
    </style:style>
    <style:style style:name="P3" style:family="paragraph" style:parent-style-name="Standard" style:list-style-name="L1">
      <style:text-properties officeooo:paragraph-rsid="0016f545"/>
    </style:style>
    <style:style style:name="P4" style:family="paragraph" style:parent-style-name="Standard">
      <style:text-properties officeooo:rsid="0016f545" officeooo:paragraph-rsid="0016f545"/>
    </style:style>
    <style:style style:name="P5" style:family="paragraph" style:parent-style-name="Standard">
      <style:text-properties officeooo:rsid="0016af9c" officeooo:paragraph-rsid="0016af9c"/>
    </style:style>
    <style:style style:name="T1" style:family="text">
      <style:text-properties fo:color="#ff4000" loext:opacity="100%" fo:font-weight="bold" style:font-weight-asian="bold" style:font-weight-complex="bold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af9c"/>
    </style:style>
    <style:style style:name="T5" style:family="text">
      <style:text-properties officeooo:rsid="0016f545"/>
    </style:style>
    <style:style style:name="T6" style:family="text">
      <style:text-properties officeooo:rsid="00141ec5"/>
    </style:style>
    <style:style style:name="T7" style:family="text">
      <style:text-properties officeooo:rsid="001780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lab is to setup and test BPDU Guard and Portfast on switches</text:p>
      <text:p text:style-name="P1"/>
      <text:p text:style-name="P1"/>
      <text:p text:style-name="P1"><text:span text:style-name="T1">Test 1:</text:span> Enable BPDU Guard on Switch 1 interfaces 1 through 10</text:p>
      <text:p text:style-name="P1"><text:span text:style-name="T2">Test 1.1</text:span> – use command “int range fa0/1 – 10” then “spanning-tree bpduguard enable”</text:p>
      <text:p text:style-name="P1"><text:span text:style-name="T3">Expectation:</text:span> BPDU Guard will be enabled, preventing BPDUs from being received on interfaces without issue.</text:p>
      <text:p text:style-name="P1"><text:span text:style-name="T3">Outcome:</text:span> Partial Success. Interfaces 0/1 and 0/2 went into Error-disabled state while interfaces 0/3 – 10 stayed up.</text:p>
      <text:p text:style-name="P2">Problem Investigation:</text:p>
      <text:list text:style-name="L1">
        <text:list-item>
          <text:p text:style-name="P3"><text:span text:style-name="T4">Suspecting those ports are connected to switches (hence why BPDUs were b</text:span><text:span text:style-name="T5">e</text:span><text:span text:style-name="T4">ing </text:span><text:span text:style-name="T5">received</text:span><text:span text:style-name="T4">), using “show cdp neighbors” </text:span><text:span text:style-name="T5">quickly</text:span><text:span text:style-name="T4"> shows both ports are connected to Cafe01-SW02 as device ID and capability as switch.</text:span></text:p>
        </text:list-item>
        <text:list-item>
          <text:p text:style-name="P3"><text:span text:style-name="T4"><text:s/></text:span><text:span text:style-name="T5">Using “show int fa0/1” states “</text:span><text:span text:style-name="T6">Description: Uplink to Cafe01-Sw02 interface Fa0/1” </text:span><text:span text:style-name="T5">and “show int fa0/1 switchport” states “</text:span><text:span text:style-name="T6">Administrative Mode: trunk” </text:span><text:span text:style-name="T5">which means it’s connnected to another switch. (Same shows for int fa0/2)</text:span></text:p>
        </text:list-item>
      </text:list>
      <text:p text:style-name="P4"><text:span text:style-name="T3">Problem Cause:</text:span> Interfaces are connected to another switch (switch 2, trunk links setup to forward VLANs data) <text:span text:style-name="T7">so with BPDU Guard enabled it will always disable interface when it receives BDPUs</text:span></text:p>
      <text:p text:style-name="P5"><text:span text:style-name="T3">Solution:</text:span> <text:span text:style-name="T7">D</text:span><text:span text:style-name="T5">isable BPDU Guard using “</text:span>spanning-tree bpduguard disable” <text:span text:style-name="T5">on interfaces fa0/1 and fa0/2 </text:span><text:span text:style-name="T7">then issue commands “shutdown” followed by “no shutdown” to bring connections back up. Don’t enable BPDU guard on interfaces that connect to other switch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20:56:40.967327200</meta:creation-date>
    <meta:generator>LibreOffice/26.2.4.2$Windows_X86_64 LibreOffice_project/0229ac93fcf0d7cbc6376066c6f35021cef002dc</meta:generator>
    <dc:date>2026-06-28T21:50:12.320049700</dc:date>
    <meta:editing-duration>PT7M9S</meta:editing-duration>
    <meta:editing-cycles>3</meta:editing-cycles>
    <meta:document-statistic meta:table-count="0" meta:image-count="0" meta:object-count="0" meta:page-count="1" meta:paragraph-count="10" meta:word-count="205" meta:character-count="1334" meta:non-whitespace-character-count="1137"/>
  </office:meta>
</office:document-meta>
</file>