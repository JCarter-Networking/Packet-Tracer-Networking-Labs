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6b3" officeooo:paragraph-rsid="0002c6b3"/>
    </style:style>
    <style:style style:name="P2" style:family="paragraph" style:parent-style-name="Standard" style:list-style-name="L1">
      <style:text-properties officeooo:rsid="0002c6b3" officeooo:paragraph-rsid="0002c6b3"/>
    </style:style>
    <style:style style:name="P3" style:family="paragraph" style:parent-style-name="Standard" style:list-style-name="L1">
      <style:text-properties officeooo:rsid="0002f351" officeooo:paragraph-rsid="0002f351"/>
    </style:style>
    <style:style style:name="P4" style:family="paragraph" style:parent-style-name="Standard">
      <style:text-properties officeooo:rsid="0002f351" officeooo:paragraph-rsid="0002f351"/>
    </style:style>
    <style:style style:name="P5" style:family="paragraph" style:parent-style-name="Standard">
      <style:text-properties officeooo:rsid="00045942" officeooo:paragraph-rsid="00045942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800080" loext:opacity="100%" fo:font-weight="bold" style:font-weight-asian="bold" style:font-weight-complex="bold"/>
    </style:style>
    <style:style style:name="T3" style:family="text">
      <style:text-properties officeooo:rsid="00045942"/>
    </style:style>
    <style:style style:name="T4" style:family="text">
      <style:text-properties officeooo:rsid="00046b12"/>
    </style:style>
    <style:style style:name="T5" style:family="text">
      <style:text-properties fo:color="#ff8000" loext:opacity="100%" fo:font-weight="bold" officeooo:rsid="00046b12" style:font-weight-asian="bold" style:font-weight-complex="bold"/>
    </style:style>
    <style:style style:name="T6" style:family="text">
      <style:text-properties fo:font-weight="normal" officeooo:rsid="00046b12" style:font-weight-asian="normal" style:font-weight-complex="normal"/>
    </style:style>
    <style:style style:name="T7" style:family="text">
      <style:text-properties fo:color="#bf0041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Cafe router 1 set IPv6 address 2001:DB8:1:1::1 on sub-interface g0/0.10 and 2001:DB8:1:2::1 on sub-interface g0/0.20.</text:p>
      <text:p text:style-name="P1"/>
      <text:p text:style-name="P1">“<text:span text:style-name="T1">Issue</text:span>”: after issuing “Show IPv6 int brief” noticed input incorrect IPv6 address on router 1 interfaces g0/0.10 and g0/0.20 of cafe network due to keyboard key chatter, proceeded to replace addresses without removing previous addresses (2001:DB8:1:1::1 and 2001:DB88:1:1::1 on g0/0.10. 2001:DB8:1:2::1 and 2001:DB88:1:2::1 on g0/0.20)</text:p>
      <text:p text:style-name="P1"><text:span text:style-name="T2">Investigation</text:span>:</text:p>
      <text:list text:style-name="L1">
        <text:list-item>
          <text:p text:style-name="P2">Used “Show ipv6 int brief” to verify correct addresses</text:p>
        </text:list-item>
        <text:list-item>
          <text:p text:style-name="P2">Saw both IPv6 addresses and singular incorrect subnet mask</text:p>
        </text:list-item>
        <text:list-item>
          <text:p text:style-name="P3">after <text:span text:style-name="T3">searching</text:span> a while it appears RFC4291 <text:span text:style-name="T4">and 7934 </text:span><text:span text:style-name="T3">defines allowing multiple global unicast addresses to an interface or sub-interface</text:span><text:span text:style-name="T4">)</text:span></text:p>
        </text:list-item>
      </text:list>
      <text:p text:style-name="P4">“<text:span text:style-name="T5">Cause</text:span><text:span text:style-name="T4">”: </text:span><text:span text:style-name="T6">RFC 4291 and 7934 (and more) support</text:span></text:p>
      <text:p text:style-name="P5"><text:span text:style-name="T7">Thoughts on reason for “issue” and outcome</text:span>: RFC4291 allows for multiple global unicast addresses to be assigned to an interface to allow for redundancy, <text:span text:style-name="T4">removes the need for use of NAT, improves security among other things. This appears to be more a wider generic all interface on nodes/hosts than just a router or switch only thing and isn’t actually an issue but more future-proofing and fixing/preventing previous limitations from IPv4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1T02:02:35.924855900</meta:creation-date>
    <meta:generator>LibreOffice/26.2.4.2$Windows_X86_64 LibreOffice_project/0229ac93fcf0d7cbc6376066c6f35021cef002dc</meta:generator>
    <dc:date>2026-07-21T05:05:33.058928800</dc:date>
    <meta:editing-duration>PT1H45M14S</meta:editing-duration>
    <meta:editing-cycles>2</meta:editing-cycles>
    <meta:document-statistic meta:table-count="0" meta:image-count="0" meta:object-count="0" meta:page-count="1" meta:paragraph-count="8" meta:word-count="181" meta:character-count="1207" meta:non-whitespace-character-count="1037"/>
  </office:meta>
</office:document-meta>
</file>