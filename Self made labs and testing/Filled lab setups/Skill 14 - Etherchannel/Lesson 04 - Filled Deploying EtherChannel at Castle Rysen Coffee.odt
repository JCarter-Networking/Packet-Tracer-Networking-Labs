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f44" officeooo:paragraph-rsid="000b9f44"/>
    </style:style>
    <style:style style:name="P2" style:family="paragraph" style:parent-style-name="Standard" style:list-style-name="L1">
      <style:text-properties officeooo:rsid="000b9f44" officeooo:paragraph-rsid="000b9f44"/>
    </style:style>
    <style:style style:name="P3" style:family="paragraph" style:parent-style-name="Standard">
      <style:text-properties officeooo:rsid="000b9f44" officeooo:paragraph-rsid="000d042d"/>
    </style:style>
    <style:style style:name="P4" style:family="paragraph" style:parent-style-name="Standard">
      <style:text-properties fo:color="#000000" loext:opacity="100%" officeooo:rsid="0034c4f7" officeooo:paragraph-rsid="000d042d"/>
    </style:style>
    <style:style style:name="P5" style:family="paragraph" style:parent-style-name="Standard">
      <style:text-properties fo:color="#bf0041" loext:opacity="100%" officeooo:rsid="0034c4f7" officeooo:paragraph-rsid="000d042d"/>
    </style:style>
    <style:style style:name="P6" style:family="paragraph" style:parent-style-name="Standard">
      <style:text-properties officeooo:rsid="000b9f44" officeooo:paragraph-rsid="000d553a"/>
    </style:style>
    <style:style style:name="P7" style:family="paragraph" style:parent-style-name="Standard">
      <style:text-properties fo:color="#000000" loext:opacity="100%" officeooo:rsid="0034c4f7" officeooo:paragraph-rsid="000d553a"/>
    </style:style>
    <style:style style:name="T1" style:family="text">
      <style:text-properties fo:color="#ff4000" loext:opacity="100%" fo:font-weight="bold" style:font-weight-asian="bold" style:font-weight-complex="bold"/>
    </style:style>
    <style:style style:name="T2" style:family="text">
      <style:text-properties fo:color="#ff4000" loext:opacity="100%" fo:font-weight="bold" officeooo:rsid="000d042d" style:font-weight-asian="bold" style:font-weight-complex="bold"/>
    </style:style>
    <style:style style:name="T3" style:family="text">
      <style:text-properties fo:color="#158466" loext:opacity="100%" fo:font-weight="bold" style:font-weight-asian="bold" style:font-weight-complex="bold"/>
    </style:style>
    <style:style style:name="T4" style:family="text">
      <style:text-properties fo:color="#158466" loext:opacity="100%" fo:font-weight="bold" officeooo:rsid="000d042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bf0041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553a" style:font-weight-asian="normal" style:font-weight-complex="normal"/>
    </style:style>
    <style:style style:name="T10" style:family="text">
      <style:text-properties officeooo:rsid="000d55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</text:span><text:span text:style-name="T2">1</text:span><text:span text:style-name="T1">:</text:span> What happens if channel-protocol is set to LACP</text:p>
      <text:p text:style-name="P1"><text:span text:style-name="T3">Test </text:span><text:span text:style-name="T4">1</text:span><text:span text:style-name="T3">.1:</text:span> On Cafe01 switch 01 and <text:s/>switch 02 set issue command “Channel-protocol lacp” on interfaces Fa0/1 and Fa0/2</text:p>
      <text:p text:style-name="P1"><text:span text:style-name="T5">Expectation:</text:span> Etherchannel using LACP will be formed between Cafe01 switch01 and switch 02</text:p>
      <text:p text:style-name="P1">Investigation:</text:p>
      <text:list text:style-name="L1">
        <text:list-item>
          <text:p text:style-name="P2">“Show Etherchannel” shows no groups were formed</text:p>
        </text:list-item>
        <text:list-item>
          <text:p text:style-name="P2">“Show Etherchannel Summary” also shows no groups were formed</text:p>
        </text:list-item>
        <text:list-item>
          <text:p text:style-name="P2">“Show run” shows “channel-protocol lacp” is set on both interfaces Fa0/1 and Fa0/2</text:p>
        </text:list-item>
      </text:list>
      <text:p text:style-name="P3"><text:span text:style-name="T6">Outcome:</text:span> No Etherchanel is formed</text:p>
      <text:p text:style-name="P4"><text:span text:style-name="T7">Thoughts on reason for outcome: </text:span><text:span text:style-name="T8">“</text:span><text:span text:style-name="T9">Channel-protocol lacp” only sets the protocol you wish to use on those interfaces but does not set up actual etherchannel groups.</text:span></text:p>
      <text:p text:style-name="P5"/>
      <text:p text:style-name="P5"/>
      <text:p text:style-name="P1"><text:span text:style-name="T1">Test 2:</text:span> What if you configure channel-group mode as desirable after using “Channel-protocol LACP”</text:p>
      <text:p text:style-name="P6"><text:span text:style-name="T3">Test 2.1:</text:span>On Cafe01 switch 01 interfaces Fa0/1 and Fa0/2 <text:span text:style-name="T10">issue command </text:span>“channel-group 1 mode desirable”</text:p>
      <text:p text:style-name="P6"><text:span text:style-name="T5">Expectation: </text:span><text:span text:style-name="T9">Channel-group will not use PAgP modes because channel-protocol set earlier restricts interfaces to using only LACP modes.</text:span></text:p>
      <text:p text:style-name="P6"><text:span text:style-name="T6">Outcome: </text:span>Command rejected (the interface Fa0/1 is ): is already part of a channel with a different type of protocol enabled</text:p>
      <text:p text:style-name="P1">Command rejected (the interface Fa0/2 is ): is already part of a channel with a different type of protocol enabled</text:p>
      <text:p text:style-name="P7"><text:span text:style-name="T7">Thoughts on reason for outcome: “</text:span><text:span text:style-name="T9">Channel-protocol” command acts as a safety and security feature to prevent incorrect modes from being used on the interfaces they are set on as means to prevent misconfigura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23:02:25.671395600</meta:creation-date>
    <meta:generator>LibreOffice/26.2.4.2$Windows_X86_64 LibreOffice_project/0229ac93fcf0d7cbc6376066c6f35021cef002dc</meta:generator>
    <dc:date>2026-07-05T23:22:59.077817000</dc:date>
    <meta:editing-duration>PT9M31S</meta:editing-duration>
    <meta:editing-cycles>2</meta:editing-cycles>
    <meta:document-statistic meta:table-count="0" meta:image-count="0" meta:object-count="0" meta:page-count="1" meta:paragraph-count="15" meta:word-count="227" meta:character-count="1445" meta:non-whitespace-character-count="1235"/>
  </office:meta>
</office:document-meta>
</file>