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83300000439BA3E1DB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5681in" draw:z-index="0"><draw:image xlink:href="Pictures/100000010000083300000439BA3E1D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21:45:48.483851100</meta:creation-date>
    <meta:generator>LibreOffice/26.2.3.2$Windows_X86_64 LibreOffice_project/70e089b17412e4cb7773e41413306b17a2328c34</meta:generator>
    <dc:date>2026-06-18T21:49:17.619992300</dc:date>
    <meta:editing-duration>PT1M13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