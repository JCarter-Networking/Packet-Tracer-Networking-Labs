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T1" style:family="text">
      <style:text-properties officeooo:rsid="0019a8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TP is what determines if something becomes a trunk automatically or not (Desirable/Auto)</text:p>
      <text:p text:style-name="P1">VTP only works across trunk links</text:p>
      <text:p text:style-name="P1">VTP Domain will propagate by itself without having to change any settings by default</text:p>
      <text:p text:style-name="P1">VTP Server with highest Configuration Revision will <text:span text:style-name="T1">p</text:span>ropagate it's information across links</text:p>
      <text:p text:style-name="P1">Deleting a VLAN on one server will update all other devices if its revision becomes higher</text:p>
      <text:p text:style-name="P1">If deleting a VLAN then all interfaces set for that VLAN become error-disable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8T15:13:22.091423700</meta:creation-date>
    <meta:generator>LibreOffice/26.2.4.2$Windows_X86_64 LibreOffice_project/0229ac93fcf0d7cbc6376066c6f35021cef002dc</meta:generator>
    <dc:date>2026-06-28T15:18:02.065812600</dc:date>
    <meta:editing-duration>PT4M40S</meta:editing-duration>
    <meta:editing-cycles>1</meta:editing-cycles>
    <meta:document-statistic meta:table-count="0" meta:image-count="0" meta:object-count="0" meta:page-count="1" meta:paragraph-count="6" meta:word-count="74" meta:character-count="465" meta:non-whitespace-character-count="397"/>
  </office:meta>
</office:document-meta>
</file>