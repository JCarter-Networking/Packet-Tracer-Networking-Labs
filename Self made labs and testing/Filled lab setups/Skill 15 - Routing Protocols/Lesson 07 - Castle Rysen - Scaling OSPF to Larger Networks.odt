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3D000001C48C0EC761.png" manifest:media-type="image/png"/>
  <manifest:file-entry manifest:full-path="Pictures/100000010000018F0000001A817EFC3C.png" manifest:media-type="image/png"/>
  <manifest:file-entry manifest:full-path="Pictures/1000000100000330000001C1387ABCA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2c41" officeooo:paragraph-rsid="00132c41"/>
    </style:style>
    <style:style style:name="P2" style:family="paragraph" style:parent-style-name="Standard" style:list-style-name="L1">
      <style:text-properties officeooo:rsid="00132c41" officeooo:paragraph-rsid="00132c41"/>
    </style:style>
    <style:style style:name="P3" style:family="paragraph" style:parent-style-name="Standard">
      <style:text-properties fo:color="#55308d" loext:opacity="100%" fo:font-weight="bold" officeooo:rsid="0015901b" officeooo:paragraph-rsid="0015901b" style:font-weight-asian="bold" style:font-weight-complex="bold"/>
    </style:style>
    <style:style style:name="P4" style:family="paragraph" style:parent-style-name="Standard" style:list-style-name="L2">
      <style:text-properties fo:color="#000000" loext:opacity="100%" fo:font-weight="normal" officeooo:rsid="0015901b" officeooo:paragraph-rsid="0015901b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15901b" officeooo:paragraph-rsid="0015901b" style:font-weight-asian="normal" style:font-weight-complex="normal"/>
    </style:style>
    <style:style style:name="T1" style:family="text">
      <style:text-properties fo:color="#158466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55308d" loext:opacity="100%" fo:font-weight="bold" style:font-weight-asian="bold" style:font-weight-complex="bold"/>
    </style:style>
    <style:style style:name="T5" style:family="text">
      <style:text-properties fo:color="#bf0041" loext:opacity="100%" fo:font-weight="bold" style:font-weight-asian="bold" style:font-weight-complex="bold"/>
    </style:style>
    <style:style style:name="T6" style:family="text">
      <style:text-properties officeooo:rsid="0015eb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tion 1</text:span><text:span text:style-name="T2">:</text:span> What happens to default-route previously set on Cafe01 router when ISP router is disconnected.</text:p>
      <text:p text:style-name="P1"><text:span text:style-name="T3">Investigation</text:span>:</text:p>
      <text:p text:style-name="P1"><text:span text:style-name="T4">Before removal</text:span>:</text:p>
      <text:list text:style-name="L1">
        <text:list-item>
          <text:list>
            <text:list-item>
              <text:p text:style-name="P2">“Show ip route” states “Gateway of last resort is 216.0.5.1 to network 0.0.0.0” and “S* 0.0.0.0/0 [1/0] via 216.0.5.1” showing default-gateway is currently active and statically set.</text:p>
            </text:list-item>
            <text:list-item>
              <text:p text:style-name="P2"><draw:frame draw:style-name="fr1" draw:name="Image1" text:anchor-type="char" svg:x="0.5425in" svg:y="0.0161in" svg:width="6.6752in" svg:height="3.6382in" draw:z-index="0"><draw:image xlink:href="Pictures/100000010000033D000001C48C0EC761.png" xlink:type="simple" xlink:show="embed" xlink:actuate="onLoad" draw:mime-type="image/png"/></draw:frame>“Show run” states “ip route 0.0.0.0 0.0.0.0 216.0.5.1” showing default-route set up</text:p>
            </text:list-item>
          </text:list>
        </text:list-item>
      </text:list>
      <text:p text:style-name="P3"><draw:frame draw:style-name="fr1" draw:name="Image2" text:anchor-type="char" svg:x="0.9028in" svg:y="0.0075in" svg:width="4.1571in" svg:height="0.2709in" draw:z-index="1"><draw:image xlink:href="Pictures/100000010000018F0000001A817EFC3C.png" xlink:type="simple" xlink:show="embed" xlink:actuate="onLoad" draw:mime-type="image/png"/></draw:frame><text:tab/></text:p>
      <text:p text:style-name="P3"/>
      <text:p text:style-name="P3">After Removal:</text:p>
      <text:list text:style-name="L2">
        <text:list-item>
          <text:p text:style-name="P4"><draw:frame draw:style-name="fr1" draw:name="Image3" text:anchor-type="char" svg:x="0.2453in" svg:y="0.2736in" svg:width="6.6752in" svg:height="3.672in" draw:z-index="2"><draw:image xlink:href="Pictures/1000000100000330000001C1387ABCAD.png" xlink:type="simple" xlink:show="embed" xlink:actuate="onLoad" draw:mime-type="image/png"/></draw:frame>“Show IP route” states “Gateway of last resort is not set” and static route disappeared</text:p>
        </text:list-item>
        <text:list-item>
          <text:p text:style-name="P4"><text:soft-page-break/>“Show run” states “ip route 0.0.0.0 0.0.0.0 216.0.5.1” showing manually set static route is still in the configuration</text:p>
        </text:list-item>
      </text:list>
      <text:p text:style-name="P5"><draw:frame draw:style-name="fr1" draw:name="Image2 Copy 1" text:anchor-type="char" svg:x="0.4299in" svg:y="0.0618in" svg:width="4.1571in" svg:height="0.2709in" draw:z-index="3"><draw:image xlink:href="Pictures/100000010000018F0000001A817EFC3C.png" xlink:type="simple" xlink:show="embed" xlink:actuate="onLoad" draw:mime-type="image/png"/></draw:frame></text:p>
      <text:p text:style-name="P5"/>
      <text:p text:style-name="P5"><text:span text:style-name="T5">Thoughts on reasoning for outcome</text:span>: <text:span text:style-name="T6">Even though a default-gateway was set for the router, because the interface connection to the network became down/disconnected it acted as a regular route in the routing table and disappeared as both “gateway of last resort” and as a statically set listing in the tabl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2T23:22:17.135848700</meta:creation-date>
    <meta:generator>LibreOffice/26.2.4.2$Windows_X86_64 LibreOffice_project/0229ac93fcf0d7cbc6376066c6f35021cef002dc</meta:generator>
    <dc:date>2026-07-13T00:12:02.314368600</dc:date>
    <meta:editing-duration>PT10M1S</meta:editing-duration>
    <meta:editing-cycles>3</meta:editing-cycles>
    <meta:document-statistic meta:table-count="0" meta:image-count="4" meta:object-count="0" meta:page-count="2" meta:paragraph-count="10" meta:word-count="147" meta:character-count="933" meta:non-whitespace-character-count="798"/>
  </office:meta>
</office:document-meta>
</file>