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loext:opacity="100%" fo:font-weight="bold" officeooo:rsid="00046535" officeooo:paragraph-rsid="00046535" style:font-weight-asian="bold" style:font-weight-complex="bold"/>
    </style:style>
    <style:style style:name="P2" style:family="paragraph" style:parent-style-name="Standard">
      <style:text-properties fo:color="#000000" loext:opacity="100%" fo:font-weight="normal" officeooo:rsid="0005b4e0" officeooo:paragraph-rsid="0005b4e0" style:font-weight-asian="normal" style:font-weight-complex="normal"/>
    </style:style>
    <style:style style:name="P3" style:family="paragraph" style:parent-style-name="Standard" style:list-style-name="L1">
      <style:text-properties fo:color="#000000" loext:opacity="100%" fo:font-weight="normal" officeooo:rsid="0005c6e6" officeooo:paragraph-rsid="0005c6e6" style:font-weight-asian="normal" style:font-weight-complex="normal"/>
    </style:style>
    <style:style style:name="P4" style:family="paragraph" style:parent-style-name="Standard" style:list-style-name="L1">
      <style:text-properties fo:color="#000000" loext:opacity="100%" officeooo:rsid="0005c6e6" officeooo:paragraph-rsid="0005c6e6"/>
    </style:style>
    <style:style style:name="P5" style:family="paragraph" style:parent-style-name="Standard">
      <style:text-properties fo:color="#000000" loext:opacity="100%" officeooo:rsid="0008a6f4" officeooo:paragraph-rsid="0008a6f4"/>
    </style:style>
    <style:style style:name="P6" style:family="paragraph" style:parent-style-name="Standard">
      <style:text-properties fo:color="#000000" loext:opacity="100%" officeooo:rsid="0009092d" officeooo:paragraph-rsid="0009092d"/>
    </style:style>
    <style:style style:name="T1" style:family="text">
      <style:text-properties fo:color="#000000" loext:opacity="100%" fo:font-weight="normal" officeooo:rsid="0005b4e0" style:font-weight-asian="normal" style:font-weight-complex="normal"/>
    </style:style>
    <style:style style:name="T2" style:family="text">
      <style:text-properties fo:color="#800080" loext:opacity="100%"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8000" loext:opacity="100%" fo:font-weight="bold" style:font-weight-asian="bold" style:font-weight-complex="bold"/>
    </style:style>
    <style:style style:name="T5" style:family="text">
      <style:text-properties fo:color="#00a933" loext:opacity="100%" fo:font-weight="bold" style:font-weight-asian="bold" style:font-weight-complex="bold"/>
    </style:style>
    <style:style style:name="T6" style:family="text">
      <style:text-properties fo:color="#bf0041" loext:opacity="100%" fo:font-weight="bold" officeooo:rsid="002949ab" style:font-weight-asian="bold" style:font-weight-complex="bold"/>
    </style:style>
    <style:style style:name="T7" style:family="text">
      <style:text-properties fo:color="#bf0041" loext:opacity="100%" fo:font-weight="bold" officeooo:rsid="002b0d4d" style:font-weight-asian="bold" style:font-weight-complex="bold"/>
    </style:style>
    <style:style style:name="T8" style:family="text">
      <style:text-properties fo:color="#bf0041" loext:opacity="100%" fo:font-weight="normal" officeooo:rsid="002949ab"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sue 1: <text:span text:style-name="T1">after setting up OSPF on both Cafe and Fallout Shelter routers OSPF did not make neighbors</text:span></text:p>
      <text:p text:style-name="P2"><text:span text:style-name="T2">Investigation:</text:span></text:p>
      <text:list text:style-name="L1">
        <text:list-item>
          <text:p text:style-name="P3">“Show ip ospf neighbor” showed nothing, just a blank return</text:p>
        </text:list-item>
        <text:list-item>
          <text:p text:style-name="P4"><text:span text:style-name="T3">“Show ip ospf” showed </text:span>Number of interfaces in this area is 1</text:p>
        </text:list-item>
        <text:list-item>
          <text:p text:style-name="P4"><text:span text:style-name="T3">“Show run” shows </text:span>network 10.0.18.1 0.0.0.0 area 0 and network 172.16.0.1 0.0.0.0 area 0 on Cafe router and <text:span text:style-name="T3">network 172.16.0.1 0.0.0.0 area 0 on Fallout Shelter router</text:span></text:p>
        </text:list-item>
      </text:list>
      <text:p text:style-name="P5"><text:span text:style-name="T4">Cause:</text:span> Incorrect IP address used for network command on cafe router using wildcard mask 0.0.0.0</text:p>
      <text:p text:style-name="P6"><text:span text:style-name="T5">Solution:</text:span> Use exact IP address when using 0.0.0.0 as wildcard mask or use normal wildcard mask if not using exact IP address of interface</text:p>
      <text:p text:style-name="P6"><text:span text:style-name="T6">Thought</text:span><text:span text:style-name="T7">s</text:span><text:span text:style-name="T6"> </text:span><text:span text:style-name="T7">on</text:span><text:span text:style-name="T6"> reason </text:span><text:span text:style-name="T7">for issue and solution</text:span><text:span text:style-name="T8">: </text:span><text:span text:style-name="T3">A Wildcard mask of 0.0.0.0 means every bit of an address given must match exactly for an interface to be included (so must be exact IP address of the interface), where as if using a normal wildcard mask, such as 0.0.0.3 in this instance, would mean that only the network bits need to match and could use 172.16.0.1. Suggested best practice is to put exact interface IP address with wildcard mask of 0.0.0.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2T02:22:38.028604100</meta:creation-date>
    <meta:generator>LibreOffice/26.2.4.2$Windows_X86_64 LibreOffice_project/0229ac93fcf0d7cbc6376066c6f35021cef002dc</meta:generator>
    <dc:date>2026-07-12T03:41:27.784614300</dc:date>
    <meta:editing-duration>PT1H7M21S</meta:editing-duration>
    <meta:editing-cycles>5</meta:editing-cycles>
    <meta:document-statistic meta:table-count="0" meta:image-count="0" meta:object-count="0" meta:page-count="1" meta:paragraph-count="8" meta:word-count="190" meta:character-count="1085" meta:non-whitespace-character-count="906"/>
  </office:meta>
</office:document-meta>
</file>