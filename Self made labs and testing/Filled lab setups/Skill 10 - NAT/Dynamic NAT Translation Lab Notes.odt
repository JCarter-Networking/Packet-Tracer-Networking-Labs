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ae011" officeooo:paragraph-rsid="00150f0f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20pt" fo:font-weight="bold" officeooo:rsid="000de2a4" officeooo:paragraph-rsid="00150f0f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5pt" fo:font-weight="bold" officeooo:rsid="00150f0f" officeooo:paragraph-rsid="00150f0f" style:font-size-asian="15pt" style:font-weight-asian="bold" style:font-size-complex="15pt" style:font-weight-complex="bold"/>
    </style:style>
    <style:style style:name="P4" style:family="paragraph" style:parent-style-name="Text_20_body">
      <style:text-properties fo:font-size="15pt" fo:font-weight="bold" officeooo:rsid="0016d53c" officeooo:paragraph-rsid="0016d53c" style:font-size-asian="15pt" style:font-weight-asian="bold" style:font-size-complex="15pt" style:font-weight-complex="bold"/>
    </style:style>
    <style:style style:name="P5" style:family="paragraph" style:parent-style-name="Text_20_body">
      <style:text-properties fo:font-size="12pt" fo:font-weight="bold" officeooo:rsid="0016d53c" officeooo:paragraph-rsid="0016d53c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size="12pt" fo:font-weight="bold" officeooo:rsid="00150f0f" officeooo:paragraph-rsid="00150f0f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2pt" fo:font-weight="bold" officeooo:rsid="00150f0f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6d53c" officeooo:paragraph-rsid="00150f0f" style:font-size-asian="12pt" style:font-weight-asian="bold" style:font-size-complex="12pt" style:font-weight-complex="bold"/>
    </style:style>
    <style:style style:name="P9" style:family="paragraph" style:parent-style-name="Standard">
      <style:text-properties fo:font-weight="normal" officeooo:rsid="000c05e2" officeooo:paragraph-rsid="0016d53c" style:font-weight-asian="normal" style:font-weight-complex="normal"/>
    </style:style>
    <style:style style:name="P10" style:family="paragraph" style:parent-style-name="Standard">
      <style:text-properties fo:font-weight="bold" officeooo:rsid="000894a8" officeooo:paragraph-rsid="00175287" style:font-weight-asian="bold" style:font-weight-complex="bold"/>
    </style:style>
    <style:style style:name="P11" style:family="paragraph" style:parent-style-name="Standard">
      <style:text-properties fo:font-weight="bold" officeooo:rsid="000894a8" officeooo:paragraph-rsid="001b3e01" style:font-weight-asian="bold" style:font-weight-complex="bold"/>
    </style:style>
    <style:style style:name="P12" style:family="paragraph" style:parent-style-name="Standard">
      <style:text-properties fo:font-weight="normal" officeooo:rsid="00089d9f" officeooo:paragraph-rsid="00175287" style:font-weight-asian="normal" style:font-weight-complex="normal"/>
    </style:style>
    <style:style style:name="P13" style:family="paragraph" style:parent-style-name="Text_20_body">
      <style:text-properties fo:color="#ff4000" loext:opacity="100%" fo:font-size="15pt" fo:font-weight="bold" officeooo:rsid="0016d53c" officeooo:paragraph-rsid="00214688" style:font-size-asian="15pt" style:font-weight-asian="bold" style:font-size-complex="15pt" style:font-weight-complex="bold"/>
    </style:style>
    <style:style style:name="P14" style:family="paragraph" style:parent-style-name="Text_20_body">
      <style:text-properties fo:font-size="15pt" fo:font-weight="bold" officeooo:rsid="0016d53c" officeooo:paragraph-rsid="00214688" style:font-size-asian="15pt" style:font-weight-asian="bold" style:font-size-complex="15pt" style:font-weight-complex="bold"/>
    </style:style>
    <style:style style:name="P15" style:family="paragraph" style:parent-style-name="Standard">
      <style:text-properties fo:font-weight="bold" officeooo:rsid="00214688" officeooo:paragraph-rsid="00214688" style:font-weight-asian="bold" style:font-weight-complex="bold"/>
    </style:style>
    <style:style style:name="P16" style:family="paragraph" style:parent-style-name="Standard">
      <style:text-properties fo:font-weight="normal" officeooo:rsid="000c05e2" officeooo:paragraph-rsid="00214688" style:font-weight-asian="normal" style:font-weight-complex="normal"/>
    </style:style>
    <style:style style:name="P17" style:family="paragraph" style:parent-style-name="Standard">
      <style:text-properties fo:font-weight="bold" officeooo:rsid="000894a8" officeooo:paragraph-rsid="00214688" style:font-weight-asian="bold" style:font-weight-complex="bold"/>
    </style:style>
    <style:style style:name="P18" style:family="paragraph" style:parent-style-name="Standard">
      <style:text-properties officeooo:rsid="000894a8" officeooo:paragraph-rsid="00214688"/>
    </style:style>
    <style:style style:name="P19" style:family="paragraph" style:parent-style-name="Standard">
      <style:text-properties fo:font-weight="normal" officeooo:rsid="00089d9f" officeooo:paragraph-rsid="00214688" style:font-weight-asian="normal" style:font-weight-complex="normal"/>
    </style:style>
    <style:style style:name="P20" style:family="paragraph" style:parent-style-name="Standard">
      <style:text-properties fo:font-weight="normal" officeooo:rsid="00089d9f" officeooo:paragraph-rsid="00227457" style:font-weight-asian="normal" style:font-weight-complex="normal"/>
    </style:style>
    <style:style style:name="P21" style:family="paragraph" style:parent-style-name="Text_20_body">
      <style:text-properties fo:font-size="15pt" fo:font-weight="bold" officeooo:rsid="0016d53c" officeooo:paragraph-rsid="001a4705" style:font-size-asian="15pt" style:font-weight-asian="bold" style:font-size-complex="15pt" style:font-weight-complex="bold"/>
    </style:style>
    <style:style style:name="P22" style:family="paragraph" style:parent-style-name="Text_20_body">
      <style:text-properties fo:font-size="12pt" fo:font-weight="bold" officeooo:rsid="001a4705" officeooo:paragraph-rsid="001a4705" style:font-size-asian="12pt" style:font-weight-asian="bold" style:font-size-complex="12pt" style:font-weight-complex="bold"/>
    </style:style>
    <style:style style:name="P23" style:family="paragraph" style:parent-style-name="Standard">
      <style:text-properties fo:font-weight="normal" officeooo:rsid="000c05e2" officeooo:paragraph-rsid="001a4705" style:font-weight-asian="normal" style:font-weight-complex="normal"/>
    </style:style>
    <style:style style:name="P24" style:family="paragraph" style:parent-style-name="Standard">
      <style:text-properties fo:font-weight="bold" officeooo:rsid="000894a8" officeooo:paragraph-rsid="001a4705" style:font-weight-asian="bold" style:font-weight-complex="bold"/>
    </style:style>
    <style:style style:name="P25" style:family="paragraph" style:parent-style-name="Standard">
      <style:text-properties fo:font-weight="normal" officeooo:rsid="00089d9f" officeooo:paragraph-rsid="001a4705" style:font-weight-asian="normal" style:font-weight-complex="normal"/>
    </style:style>
    <style:style style:name="T1" style:family="text">
      <style:text-properties officeooo:rsid="000de2a4"/>
    </style:style>
    <style:style style:name="T2" style:family="text">
      <style:text-properties officeooo:rsid="00186006"/>
    </style:style>
    <style:style style:name="T3" style:family="text">
      <style:text-properties officeooo:rsid="00150f0f"/>
    </style:style>
    <style:style style:name="T4" style:family="text">
      <style:text-properties fo:font-size="20pt" officeooo:rsid="000de2a4" style:font-size-asian="20pt" style:font-size-complex="20pt"/>
    </style:style>
    <style:style style:name="T5" style:family="text">
      <style:text-properties fo:font-size="20pt" officeooo:rsid="00150f0f" style:font-size-asian="20pt" style:font-size-complex="20pt"/>
    </style:style>
    <style:style style:name="T6" style:family="text">
      <style:text-properties fo:font-size="20pt" officeooo:rsid="00094480" style:font-size-asian="20pt" style:font-size-complex="20pt"/>
    </style:style>
    <style:style style:name="T7" style:family="text">
      <style:text-properties fo:font-size="20pt" officeooo:rsid="000585ca" style:font-size-asian="20pt" style:font-size-complex="2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4000" loext:opacity="100%"/>
    </style:style>
    <style:style style:name="T10" style:family="text">
      <style:text-properties officeooo:rsid="001a470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8d43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8d431" style:font-weight-asian="normal" style:font-weight-complex="normal"/>
    </style:style>
    <style:style style:name="T15" style:family="text">
      <style:text-properties officeooo:rsid="001b3e01"/>
    </style:style>
    <style:style style:name="T16" style:family="text">
      <style:text-properties fo:font-weight="bold" officeooo:rsid="0012f367" style:font-weight-asian="bold" style:font-weight-complex="bold"/>
    </style:style>
    <style:style style:name="T17" style:family="text">
      <style:text-properties fo:color="#ff4000" loext:opacity="100%" officeooo:rsid="001a4705"/>
    </style:style>
    <style:style style:name="T18" style:family="text">
      <style:text-properties fo:font-weight="normal" officeooo:rsid="001a4705" style:font-weight-asian="normal" style:font-weight-complex="normal"/>
    </style:style>
    <style:style style:name="T19" style:family="text">
      <style:text-properties fo:font-weight="bold" officeooo:rsid="001b3e01" style:font-weight-asian="bold" style:font-weight-complex="bold"/>
    </style:style>
    <style:style style:name="T20" style:family="text">
      <style:text-properties fo:font-weight="normal" officeooo:rsid="00214688" style:font-weight-asian="normal" style:font-weight-complex="normal"/>
    </style:style>
    <style:style style:name="T21" style:family="text">
      <style:text-properties fo:font-weight="normal" officeooo:rsid="001c92b9" style:font-weight-asian="normal" style:font-weight-complex="normal"/>
    </style:style>
    <style:style style:name="T22" style:family="text">
      <style:text-properties fo:font-weight="normal" officeooo:rsid="00227457" style:font-weight-asian="normal" style:font-weight-complex="normal"/>
    </style:style>
    <style:style style:name="T23" style:family="text">
      <style:text-properties officeooo:rsid="00227457"/>
    </style:style>
    <style:style style:name="T24" style:family="text">
      <style:text-properties fo:color="#ff4000" loext:opacity="100%" officeooo:rsid="00214688"/>
    </style:style>
    <style:style style:name="T25" style:family="text">
      <style:text-properties officeooo:rsid="001c92b9"/>
    </style:style>
    <style:style style:name="T26" style:family="text">
      <style:text-properties fo:font-weight="normal" officeooo:rsid="001d9960" style:font-weight-asian="normal" style:font-weight-complex="normal"/>
    </style:style>
    <style:style style:name="T27" style:family="text">
      <style:text-properties officeooo:rsid="001d99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his is to simulate internet networks that are set up to not to reply to private addresses and show the <text:span text:style-name="T2">limitations of </text:span><text:span text:style-name="T3">Dynamic</text:span><text:span text:style-name="T2"> </text:span>NAT translation</text:p>
      <text:p text:style-name="P2"/>
      <text:p text:style-name="P1"><text:span text:style-name="T4">Issues I encountered when setting up </text:span><text:span text:style-name="T5">Dynamic</text:span><text:span text:style-name="T6"> </text:span><text:span text:style-name="T7">NAT</text:span></text:p>
      <text:p text:style-name="P3"><text:span text:style-name="T8"/></text:p>
      <text:p text:style-name="P4"><text:span text:style-name="T9">Issue 1</text:span>:</text:p>
      <text:p text:style-name="P5">While adjusting address on ISP Router <text:span text:style-name="T10">to a /24 network from a /30 to allow for pool of IP addresses for lab</text:span>:</text:p>
      <text:p text:style-name="P6">ISPRouter(config-if)#ip add 216.0.5.0 255.255.255.0</text:p>
      <text:p text:style-name="P7">Bad mask /24 for address 216.0.5.0</text:p>
      <text:p text:style-name="P8"/>
      <text:p text:style-name="P9"><text:span text:style-name="T11">Expectation</text:span>: <text:span text:style-name="T12">IP address set up without problem</text:span></text:p>
      <text:p text:style-name="P10">Outcome:<text:span text:style-name="T13"> </text:span><text:span text:style-name="T14">Error appears claiming bad mask for address</text:span></text:p>
      <text:p text:style-name="P11">Problem <text:span text:style-name="T15">investigation</text:span>: <text:span text:style-name="T14">After looking at typed command wrong network host address was used</text:span></text:p>
      <text:p text:style-name="P12"><text:span text:style-name="T11">Problem </text:span><text:span text:style-name="T16">Cause</text:span><text:span text:style-name="T11">: </text:span><text:span text:style-name="T12">Host address used was incorrect. Host address was to be .1 not .0 which is network address </text:span></text:p>
      <text:p text:style-name="P12"><text:span text:style-name="T11">Solution: </text:span><text:span text:style-name="T12">put .1 as correct host address for /24 network.</text:span></text:p>
      <text:p text:style-name="P13"/>
      <text:p text:style-name="P14"><text:span text:style-name="T9">Issue </text:span><text:span text:style-name="T17">2</text:span>:</text:p>
      <text:p text:style-name="P15">Pinging from Cafe01_PC01 to Cloudflare 1.1.1.1</text:p>
      <text:p text:style-name="P16"><text:span text:style-name="T11">Expectation</text:span>: <text:span text:style-name="T10">Can ping successfully</text:span></text:p>
      <text:p text:style-name="P17">Outcome:<text:span text:style-name="T13"> </text:span><text:span text:style-name="T18">Pings fail, Request Timed Out</text:span></text:p>
      <text:p text:style-name="P18"><text:span text:style-name="T11">Problem </text:span><text:span text:style-name="T19">investigation</text:span><text:span text:style-name="T11">: </text:span><text:span text:style-name="T20">U</text:span><text:span text:style-name="T21">sing ‘show ip nat translation’ shows that pinging from Cafe01-PC01 </text:span><text:span text:style-name="T20">does not translate. <text:s/></text:span><text:span text:style-name="T22">Using ‘show ip nat statistics’ shows inside source of ‘</text:span><text:span text:style-name="T23">CAFE01_PUBLIC’ pool used instead of Cafe01_PUBLIC.</text:span></text:p>
      <text:p text:style-name="P19"><text:span text:style-name="T11">Problem </text:span><text:span text:style-name="T16">Cause</text:span><text:span text:style-name="T11">: </text:span><text:span text:style-name="T23">Mismatch of case used for pool name</text:span></text:p>
      <text:p text:style-name="P20"><text:span text:style-name="T11">Solution: </text:span><text:span text:style-name="T23">Remove incorrect ‘CAFE01_PUBLIC’command and input correct ‘Cafe01_PUBLIC’ command</text:span></text:p>
      <text:p text:style-name="P12"/>
      <text:p text:style-name="P21"><text:span text:style-name="T9">Issue </text:span><text:span text:style-name="T24">3</text:span>:</text:p>
      <text:p text:style-name="P22">Pinging from Cafe01-Guest01 to Cloudflare 1.1.1.1</text:p>
      <text:p text:style-name="P23"><text:span text:style-name="T11">Expectation</text:span>: <text:span text:style-name="T10">Can ping successfully</text:span></text:p>
      <text:p text:style-name="P24">Outcome:<text:span text:style-name="T13"> </text:span><text:span text:style-name="T18">Pings fail, Request Timed Out</text:span></text:p>
      <text:p text:style-name="P24">Problem <text:span text:style-name="T15">investigation</text:span>: <text:span text:style-name="T25">U</text:span><text:span text:style-name="T21">sing ‘show ip nat translation’ shows that pinging from Cafe01-PC01 successfully translate but Cafe01-Guest01 does not. Using ‘show ip access-lists’ shows Guest network was correctly added to access list 1. </text:span><text:span text:style-name="T26">Using “show ip nat statistics” shows correct outside interface and inside interface set as only FastEthernet 0/0.10 and no others</text:span></text:p>
      <text:p text:style-name="P25"><text:span text:style-name="T11">Problem </text:span><text:span text:style-name="T16">Cause</text:span><text:span text:style-name="T11">: </text:span><text:span text:style-name="T27">Sub-interfaces on inside interface Fa0/0 for VLAN20/30/40 are not set as inside interfaces for NAT Translation</text:span></text:p>
      <text:p text:style-name="P25"><text:span text:style-name="T11">Solution: </text:span><text:span text:style-name="T27">Issue command ‘ip nat inside’ on sub-interfaces Fa0/0.20, Fa0/0.30 and Fa0.0/4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4T12:47:53.836110400</meta:creation-date>
    <dc:date>2026-06-14T15:05:25.024291600</dc:date>
    <meta:editing-duration>PT1H5M52S</meta:editing-duration>
    <meta:editing-cycles>7</meta:editing-cycles>
    <meta:generator>LibreOffice/26.2.3.2$Windows_X86_64 LibreOffice_project/70e089b17412e4cb7773e41413306b17a2328c34</meta:generator>
    <meta:document-statistic meta:table-count="0" meta:image-count="0" meta:object-count="0" meta:page-count="1" meta:paragraph-count="25" meta:word-count="290" meta:character-count="1927" meta:non-whitespace-character-count="1660"/>
  </office:meta>
</office:document-meta>
</file>