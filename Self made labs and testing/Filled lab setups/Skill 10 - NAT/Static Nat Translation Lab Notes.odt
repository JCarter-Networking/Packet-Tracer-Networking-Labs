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5pt" fo:font-weight="bold" officeooo:rsid="000ae011" officeooo:paragraph-rsid="000de2a4" style:font-size-asian="15pt" style:font-weight-asian="bold" style:font-size-complex="15pt" style:font-weight-complex="bold"/>
    </style:style>
    <style:style style:name="P2" style:family="paragraph" style:parent-style-name="Standard">
      <style:text-properties fo:font-size="20pt" fo:font-weight="bold" officeooo:rsid="000585ca" officeooo:paragraph-rsid="000de2a4" style:font-size-asian="20pt" style:font-weight-asian="bold" style:font-size-complex="20pt" style:font-weight-complex="bold"/>
    </style:style>
    <style:style style:name="P3" style:family="paragraph" style:parent-style-name="Standard">
      <style:text-properties fo:font-size="15pt" fo:font-weight="normal" officeooo:rsid="000de2a4" officeooo:paragraph-rsid="000de2a4" style:font-size-asian="15pt" style:font-weight-asian="normal" style:font-size-complex="15pt" style:font-weight-complex="normal"/>
    </style:style>
    <style:style style:name="P4" style:family="paragraph" style:parent-style-name="Standard">
      <style:text-properties fo:font-weight="bold" officeooo:rsid="00070fdb" officeooo:paragraph-rsid="000de2a4" style:font-weight-asian="bold" style:font-weight-complex="bold"/>
    </style:style>
    <style:style style:name="P5" style:family="paragraph" style:parent-style-name="Standard">
      <style:text-properties fo:font-weight="bold" officeooo:rsid="000894a8" officeooo:paragraph-rsid="000de2a4" style:font-weight-asian="bold" style:font-weight-complex="bold"/>
    </style:style>
    <style:style style:name="P6" style:family="paragraph" style:parent-style-name="Standard">
      <style:text-properties fo:font-weight="normal" officeooo:rsid="00094480" officeooo:paragraph-rsid="000de2a4" style:font-weight-asian="normal" style:font-weight-complex="normal"/>
    </style:style>
    <style:style style:name="P7" style:family="paragraph" style:parent-style-name="Standard">
      <style:text-properties fo:font-weight="normal" officeooo:rsid="000c05e2" officeooo:paragraph-rsid="000de2a4" style:font-weight-asian="normal" style:font-weight-complex="normal"/>
    </style:style>
    <style:style style:name="P8" style:family="paragraph" style:parent-style-name="Standard">
      <style:text-properties fo:font-weight="normal" officeooo:rsid="000c05e2" officeooo:paragraph-rsid="000fd746" style:font-weight-asian="normal" style:font-weight-complex="normal"/>
    </style:style>
    <style:style style:name="P9" style:family="paragraph" style:parent-style-name="Standard">
      <style:text-properties fo:font-weight="bold" officeooo:rsid="000ee11d" officeooo:paragraph-rsid="000de2a4" style:font-weight-asian="bold" style:font-weight-complex="bold"/>
    </style:style>
    <style:style style:name="P10" style:family="paragraph" style:parent-style-name="Standard">
      <style:text-properties officeooo:rsid="000604f7" officeooo:paragraph-rsid="000de2a4"/>
    </style:style>
    <style:style style:name="P11" style:family="paragraph" style:parent-style-name="Standard">
      <style:text-properties officeooo:rsid="000894a8" officeooo:paragraph-rsid="000fd746"/>
    </style:style>
    <style:style style:name="P12" style:family="paragraph" style:parent-style-name="Standard">
      <style:text-properties fo:font-weight="normal" officeooo:rsid="00089d9f" officeooo:paragraph-rsid="000de2a4" style:font-weight-asian="normal" style:font-weight-complex="normal"/>
    </style:style>
    <style:style style:name="P13" style:family="paragraph" style:parent-style-name="Standard">
      <style:text-properties fo:color="#ff4000" loext:opacity="100%" fo:font-size="16pt" fo:font-weight="bold" officeooo:rsid="000ee11d" officeooo:paragraph-rsid="000de2a4" style:font-size-asian="16pt" style:font-weight-asian="bold" style:font-size-complex="16pt" style:font-weight-complex="bold"/>
    </style:style>
    <style:style style:name="P14" style:family="paragraph" style:parent-style-name="Standard">
      <style:text-properties officeooo:rsid="0004a6eb" officeooo:paragraph-rsid="000fd746"/>
    </style:style>
    <style:style style:name="P15" style:family="paragraph" style:parent-style-name="Standard">
      <style:text-properties officeooo:paragraph-rsid="000de2a4"/>
    </style:style>
    <style:style style:name="P16" style:family="paragraph" style:parent-style-name="Standard">
      <style:text-properties officeooo:rsid="0004a6eb" officeooo:paragraph-rsid="000de2a4"/>
    </style:style>
    <style:style style:name="T1" style:family="text">
      <style:text-properties officeooo:rsid="000de2a4"/>
    </style:style>
    <style:style style:name="T2" style:family="text">
      <style:text-properties officeooo:rsid="00186006"/>
    </style:style>
    <style:style style:name="T3" style:family="text">
      <style:text-properties officeooo:rsid="00094480"/>
    </style:style>
    <style:style style:name="T4" style:family="text">
      <style:text-properties fo:color="#ff4000" loext:opacity="100%" fo:font-size="16pt" fo:font-weight="bold" style:font-size-asian="16pt" style:font-weight-asian="bold" style:font-size-complex="16pt"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weight="bold" style:font-weight-asian="bold" style:font-weight-complex="bold"/>
    </style:style>
    <style:style style:name="T7" style:family="text">
      <style:text-properties officeooo:rsid="000604f7"/>
    </style:style>
    <style:style style:name="T8" style:family="text">
      <style:text-properties fo:font-weight="bold" officeooo:rsid="001b3e01" style:font-weight-asian="bold" style:font-weight-complex="bold"/>
    </style:style>
    <style:style style:name="T9" style:family="text">
      <style:text-properties fo:font-weight="bold" officeooo:rsid="000894a8" style:font-weight-asian="bold" style:font-weight-complex="bold"/>
    </style:style>
    <style:style style:name="T10" style:family="text">
      <style:text-properties officeooo:rsid="000d9fa8"/>
    </style:style>
    <style:style style:name="T11" style:family="text">
      <style:text-properties officeooo:rsid="000ea93b"/>
    </style:style>
    <style:style style:name="T12" style:family="text">
      <style:text-properties fo:font-weight="bold" officeooo:rsid="000d9fa8" style:font-weight-asian="bold" style:font-weight-complex="bold"/>
    </style:style>
    <style:style style:name="T13" style:family="text">
      <style:text-properties officeooo:rsid="000894a8"/>
    </style:style>
    <style:style style:name="T14" style:family="text">
      <style:text-properties officeooo:rsid="000ae011"/>
    </style:style>
    <style:style style:name="T15" style:family="text">
      <style:text-properties officeooo:rsid="00089d9f"/>
    </style:style>
    <style:style style:name="T16" style:family="text">
      <style:text-properties officeooo:rsid="000ae1f7"/>
    </style:style>
    <style:style style:name="T17" style:family="text">
      <style:text-properties fo:color="#ff4000" loext:opacity="100%" fo:font-size="16pt" style:font-size-asian="16pt" style:font-size-complex="16pt"/>
    </style:style>
    <style:style style:name="T18" style:family="text">
      <style:text-properties fo:color="#ff4000" loext:opacity="100%" fo:font-size="16pt" officeooo:rsid="001002f4" style:font-size-asian="16pt" style:font-size-complex="16pt"/>
    </style:style>
    <style:style style:name="T19" style:family="text">
      <style:text-properties fo:color="#000000" loext:opacity="100%" fo:font-size="16pt" officeooo:rsid="001002f4" style:font-size-asian="16pt" style:font-size-complex="16pt"/>
    </style:style>
    <style:style style:name="T20" style:family="text">
      <style:text-properties fo:color="#000000" loext:opacity="100%" fo:font-size="15pt" officeooo:rsid="001002f4" style:font-size-asian="13.1000003814697pt" style:font-size-complex="15pt"/>
    </style:style>
    <style:style style:name="T21" style:family="text">
      <style:text-properties fo:color="#000000" loext:opacity="100%" fo:font-size="12pt" fo:font-weight="normal" officeooo:rsid="001002f4" style:font-size-asian="12pt" style:font-weight-asian="normal" style:font-size-complex="12pt" style:font-weight-complex="normal"/>
    </style:style>
    <style:style style:name="T22" style:family="text">
      <style:text-properties officeooo:rsid="001002f4"/>
    </style:style>
    <style:style style:name="T23" style:family="text">
      <style:text-properties officeooo:rsid="00116b5d"/>
    </style:style>
    <style:style style:name="T24" style:family="text">
      <style:text-properties fo:font-weight="normal" style:font-weight-asian="normal" style:font-weight-complex="normal"/>
    </style:style>
    <style:style style:name="T25" style:family="text">
      <style:text-properties fo:font-weight="normal" officeooo:rsid="001002f4" style:font-weight-asian="normal" style:font-weight-complex="normal"/>
    </style:style>
    <style:style style:name="T26" style:family="text">
      <style:text-properties fo:font-weight="normal" officeooo:rsid="000d9fa8" style:font-weight-asian="normal" style:font-weight-complex="normal"/>
    </style:style>
    <style:style style:name="T27" style:family="text">
      <style:text-properties fo:font-weight="normal" officeooo:rsid="000ea93b" style:font-weight-asian="normal" style:font-weight-complex="normal"/>
    </style:style>
    <style:style style:name="T28" style:family="text">
      <style:text-properties fo:font-weight="normal" officeooo:rsid="00116b5d" style:font-weight-asian="normal" style:font-weight-complex="normal"/>
    </style:style>
    <style:style style:name="T29" style:family="text">
      <style:text-properties fo:font-weight="normal" officeooo:rsid="0012f367" style:font-weight-asian="normal" style:font-weight-complex="normal"/>
    </style:style>
    <style:style style:name="T30" style:family="text">
      <style:text-properties fo:font-weight="normal" officeooo:rsid="00141789" style:font-weight-asian="normal" style:font-weight-complex="normal"/>
    </style:style>
    <style:style style:name="T31" style:family="text">
      <style:text-properties fo:font-weight="bold" officeooo:rsid="0012f367" style:font-weight-asian="bold" style:font-weight-complex="bold"/>
    </style:style>
    <style:style style:name="T32" style:family="text">
      <style:text-properties officeooo:rsid="00141789"/>
    </style:style>
    <style:style style:name="T33" style:family="text">
      <style:text-properties officeooo:rsid="0014df8e"/>
    </style:style>
    <style:style style:name="T34" style:family="text">
      <style:text-properties officeooo:rsid="001647de"/>
    </style:style>
    <style:style style:name="T35" style:family="text">
      <style:text-properties officeooo:rsid="001981b1"/>
    </style:style>
    <style:style style:name="T36" style:family="text">
      <style:text-properties officeooo:rsid="001a6728"/>
    </style:style>
    <style:style style:name="T37" style:family="text">
      <style:text-properties officeooo:rsid="000ee11d"/>
    </style:style>
    <style:style style:name="T38" style:family="text">
      <style:text-properties fo:font-weight="normal" officeooo:rsid="000894a8" style:font-weight-asian="normal" style:font-weight-complex="normal"/>
    </style:style>
    <style:style style:name="T39" style:family="text">
      <style:text-properties fo:font-weight="normal" officeooo:rsid="001981b1" style:font-weight-asian="normal" style:font-weight-complex="normal"/>
    </style:style>
    <style:style style:name="T40" style:family="text">
      <style:text-properties fo:font-weight="normal" officeooo:rsid="001720df" style:font-weight-asian="normal" style:font-weight-complex="normal"/>
    </style:style>
    <style:style style:name="T41" style:family="text">
      <style:text-properties fo:font-weight="normal" officeooo:rsid="001a6728" style:font-weight-asian="normal" style:font-weight-complex="normal"/>
    </style:style>
    <style:style style:name="T42" style:family="text">
      <style:text-properties fo:font-weight="bold" officeooo:rsid="0004a6eb" style:font-weight-asian="bold" style:font-weight-complex="bold"/>
    </style:style>
    <style:style style:name="T43" style:family="text">
      <style:text-properties fo:font-weight="bold" officeooo:rsid="00089d9f" style:font-weight-asian="bold" style:font-weight-complex="bold"/>
    </style:style>
    <style:style style:name="T44" style:family="text">
      <style:text-properties fo:font-weight="normal" officeooo:rsid="00089d9f"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text:span>his is to simulate internet networks that are set up to not to reply to private addresses and show the <text:span text:style-name="T2">limitations of Static </text:span>NAT translation</text:p>
      <text:p text:style-name="P2"/>
      <text:p text:style-name="P2"><text:span text:style-name="T1">Issues I encountered when setting up </text:span><text:span text:style-name="T3">Static </text:span>NAT</text:p>
      <text:p text:style-name="P3"/>
      <text:p text:style-name="P4">Set up Static NAT on Cafe01-RT01 to translate Cafe01-PC01 inside local address 172.16.02 to inside global address 216.0.5.2 <text:span text:style-name="T2">and see what happens and what problems arise from having only 1 inside global address to use.</text:span></text:p>
      <text:p text:style-name="P5"/>
      <text:p text:style-name="P6"><text:span text:style-name="T4">Test 1</text:span><text:span text:style-name="T5">:</text:span> Ping 216.0.5.1 (ISP interface) and 1.1.1.1 (simulated Cloudflare DNS on internet) from Cafe01-PC01 and Cafe01-RT01</text:p>
      <text:p text:style-name="P7"><text:span text:style-name="T6">Expectation</text:span>: <text:span text:style-name="T7">Can ping 216.0.5.1 </text:span>and 1.1.1.1 <text:span text:style-name="T7">from </text:span>Cafe01-PC01 (172.16.0.2) successfully</text:p>
      <text:p text:style-name="P7"><text:span text:style-name="T6">Outcome</text:span>: Pings Fail</text:p>
      <text:p text:style-name="P8"><text:span text:style-name="T6">Problem </text:span><text:span text:style-name="T8">investigation</text:span>:<text:span text:style-name="T9"> </text:span><text:span text:style-name="T10">After issuing command “</text:span><text:span text:style-name="T11">s</text:span><text:span text:style-name="T10">how </text:span><text:span text:style-name="T11">ip</text:span><text:span text:style-name="T10"> </text:span><text:span text:style-name="T11">n</text:span><text:span text:style-name="T10">at </text:span><text:span text:style-name="T11">t</text:span><text:span text:style-name="T10">ranslations”</text:span><text:span text:style-name="T12"> </text:span><text:span text:style-name="T13">NAT is </text:span><text:span text:style-name="T10">determined to</text:span><text:span text:style-name="T13"> not </text:span><text:span text:style-name="T10">be </text:span><text:span text:style-name="T13">translating packets from inside local address 172.16.0.2 to inside global address 216.0.5.2, </text:span><text:span text:style-name="T14">instead router is just forwarding message </text:span><text:span text:style-name="T10">using inside local address.</text:span></text:p>
      <text:p text:style-name="P7"><text:span text:style-name="T6">Problem Cause</text:span>: <text:span text:style-name="T15">NAT </text:span><text:span text:style-name="T11">i</text:span><text:span text:style-name="T15">nside </text:span><text:span text:style-name="T3">local</text:span><text:span text:style-name="T15"> interface was set to </text:span>incorrect<text:span text:style-name="T15"> interface</text:span><text:span text:style-name="T2">.</text:span><text:span text:style-name="T15"> NAT inside local interface was set to Fa0/0 interface instead of Fa0/0.10 sub-interface </text:span><text:span text:style-name="T2">setup for 172.16.0.0 VLAN</text:span><text:span text:style-name="T15">.</text:span></text:p>
      <text:p text:style-name="P7"><text:span text:style-name="T6">Solution</text:span>: <text:span text:style-name="T10">issue “ip nat inside” command on sub-interface </text:span><text:span text:style-name="T15">Fa0/0.10</text:span><text:span text:style-name="T10"> </text:span><text:span text:style-name="T16">instead of base interface Fa0/0</text:span></text:p>
      <text:p text:style-name="P7"/>
      <text:p text:style-name="P9"><text:span text:style-name="T17">Test </text:span><text:span text:style-name="T18">2</text:span><text:span text:style-name="T19">:</text:span><text:span text:style-name="T20"> </text:span><text:span text:style-name="T21">Ping 216.0.5.1 and 1.1.1.1 from Cafe01-RT01</text:span></text:p>
      <text:p text:style-name="P10"><text:span text:style-name="T6">Expectation: </text:span>Can <text:span text:style-name="T22">successfully</text:span> ping 216.0.5.1 <text:span text:style-name="T23">and 1.1.1.1</text:span> from Cafe01-RT01</text:p>
      <text:p text:style-name="P5">Outcome: <text:span text:style-name="T24">Ping</text:span><text:span text:style-name="T25">s</text:span><text:span text:style-name="T24"> </text:span><text:span text:style-name="T25">fail</text:span></text:p>
      <text:p text:style-name="P11"><text:span text:style-name="T6">Problem </text:span><text:span text:style-name="T8">investigation</text:span><text:span text:style-name="T6">: </text:span><text:span text:style-name="T26">After issuing command “</text:span><text:span text:style-name="T27">s</text:span><text:span text:style-name="T26">how </text:span><text:span text:style-name="T27">ip</text:span><text:span text:style-name="T26"> </text:span><text:span text:style-name="T27">n</text:span><text:span text:style-name="T26">at </text:span><text:span text:style-name="T27">t</text:span><text:span text:style-name="T26">ranslations”</text:span><text:span text:style-name="T12"> </text:span><text:span text:style-name="T24">NAT is </text:span><text:span text:style-name="T26">determined </text:span><text:span text:style-name="T28">to be translating</text:span><text:span text:style-name="T29"> Ping </text:span><text:span text:style-name="T28">re</text:span><text:span text:style-name="T29">ply packets to the inside local address instead of packets being </text:span><text:span text:style-name="T30">recognized</text:span><text:span text:style-name="T29"> as for itself.</text:span></text:p>
      <text:p text:style-name="P12"><text:span text:style-name="T6">Problem </text:span><text:span text:style-name="T31">Cause</text:span><text:span text:style-name="T6">:</text:span> <text:span text:style-name="T32">Only </text:span><text:span text:style-name="T33">one static nat</text:span><text:span text:style-name="T32"> inside local </text:span><text:span text:style-name="T33">address</text:span><text:span text:style-name="T32"> translation is </text:span><text:span text:style-name="T2">being used</text:span><text:span text:style-name="T32"> </text:span><text:span text:style-name="T34">causing</text:span><text:span text:style-name="T32"> all packets being sent to 216.0.5.2 </text:span><text:span text:style-name="T33">from </text:span><text:span text:style-name="T34">the </text:span><text:span text:style-name="T2">nat</text:span><text:span text:style-name="T34"> </text:span><text:span text:style-name="T2">o</text:span><text:span text:style-name="T34">utside</text:span><text:span text:style-name="T33"> interface </text:span><text:span text:style-name="T34">to be translated to the </text:span><text:span text:style-name="T2">last</text:span><text:span text:style-name="T34"> nat inside address </text:span><text:span text:style-name="T2">set/input for that inside global translation address</text:span><text:span text:style-name="T34">. </text:span></text:p>
      <text:p text:style-name="P12"><text:span text:style-name="T6">Solution:</text:span> <text:span text:style-name="T35">D</text:span><text:span text:style-name="T2">on’t use Static NAT for non-1:1/</text:span><text:span text:style-name="T35">multiple inside local</text:span><text:span text:style-name="T2"> </text:span><text:span text:style-name="T35">to one inside global address </text:span><text:span text:style-name="T2">translation because it can’t handle/ </text:span><text:span text:style-name="T35">not designed for</text:span><text:span text:style-name="T2"> multiple addresses per translation. </text:span><text:span text:style-name="T35">If setting a</text:span><text:span text:style-name="T36">n</text:span><text:span text:style-name="T35"> inside global to inside global address translation last it would allow for inside local address to translate properly and </text:span><text:span text:style-name="T36">send packets originating from outside global addresses to the device. But you have to remember to always set the inside global to inside global translation last when setting up this way.</text:span></text:p>
      <text:p text:style-name="P13"/>
      <text:p text:style-name="P9"><text:span text:style-name="T17">Test </text:span><text:span text:style-name="T18">3</text:span>: <text:span text:style-name="T24">Ping </text:span><text:span text:style-name="T25">Cafe01-RT01 ip address </text:span><text:span text:style-name="T24">216.0.5.2 from ISPRouter</text:span></text:p>
      <text:p text:style-name="P12"><text:span text:style-name="T6">Expectation:</text:span> <text:span text:style-name="T37">Can p</text:span>ing <text:span text:style-name="T37">Cafe01-RT01 on IP Address </text:span>216.0.5.2 from ISPRouter <text:span text:style-name="T22">successfully</text:span></text:p>
      <text:p text:style-name="P12"><text:span text:style-name="T6">Outcome:</text:span> <text:span text:style-name="T22">Ping to IP address</text:span> 216.0.5.2 <text:span text:style-name="T22">is successful but responding device is not Cafe01-RT01</text:span></text:p>
      <text:p text:style-name="P14"><text:span text:style-name="T6">Problem </text:span><text:span text:style-name="T8">investigation</text:span><text:span text:style-name="T6">: </text:span><text:span text:style-name="T26">After issuing command “</text:span><text:span text:style-name="T27">s</text:span><text:span text:style-name="T26">how </text:span><text:span text:style-name="T27">ip</text:span><text:span text:style-name="T26"> </text:span><text:span text:style-name="T27">n</text:span><text:span text:style-name="T26">at </text:span><text:span text:style-name="T27">t</text:span><text:span text:style-name="T26">ranslations”</text:span><text:span text:style-name="T12"> </text:span><text:span text:style-name="T38">NAT is </text:span><text:span text:style-name="T26">determined </text:span><text:span text:style-name="T28">to be translating </text:span><text:span text:style-name="T39">incoming</text:span><text:span text:style-name="T28"> </text:span><text:span text:style-name="T29">packets to the </text:span><text:span text:style-name="T40">last</text:span><text:span text:style-name="T29"> inside local address </text:span><text:span text:style-name="T41">translation created</text:span><text:span text:style-name="T40"> </text:span><text:span text:style-name="T29">instead of </text:span><text:span text:style-name="T39">b</text:span><text:span text:style-name="T29">eing </text:span><text:span text:style-name="T30">recognized</text:span><text:span text:style-name="T29"> as </text:span><text:span text:style-name="T40">the </text:span><text:span text:style-name="T41">device’s</text:span><text:span text:style-name="T40"> address itself.</text:span></text:p>
      <text:p text:style-name="P15"><text:span text:style-name="T42">Problem </text:span><text:span text:style-name="T31">Cause</text:span><text:span text:style-name="T43">:</text:span><text:span text:style-name="T44"> </text:span><text:span text:style-name="T40">No static nat translation was created for the inside global address itself. Therefore the router does not know </text:span><text:span text:style-name="T41">if </text:span><text:span text:style-name="T40">packets originating from an outside </text:span><text:span text:style-name="T41">global address </text:span><text:span text:style-name="T40">being sent to the inside global address needs to be routed to the </text:span><text:span text:style-name="T41">device itself or a specific inside local address (without other tools/methods being used).</text:span></text:p>
      <text:p text:style-name="P16"><text:soft-page-break/><text:span text:style-name="T6">Solution: </text:span><text:span text:style-name="T39">Don’t use static nat for non-1:1 IP translations because it doesn’t prevent outside addresses from accessing inside the network (as that’s what it’s ideal for like setting up a local server that can be accessed from the outsid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2T21:32:23.495915100</meta:creation-date>
    <dc:date>2026-06-14T13:45:33.152601000</dc:date>
    <meta:editing-duration>PT4M49S</meta:editing-duration>
    <meta:editing-cycles>2</meta:editing-cycles>
    <meta:generator>LibreOffice/26.2.3.2$Windows_X86_64 LibreOffice_project/70e089b17412e4cb7773e41413306b17a2328c34</meta:generator>
    <meta:document-statistic meta:table-count="0" meta:image-count="0" meta:object-count="0" meta:page-count="2" meta:paragraph-count="21" meta:word-count="509" meta:character-count="3341" meta:non-whitespace-character-count="2852"/>
  </office:meta>
</office:document-meta>
</file>