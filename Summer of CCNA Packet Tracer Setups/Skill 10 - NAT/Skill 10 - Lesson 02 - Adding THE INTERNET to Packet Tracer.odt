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size="22pt" style:font-size-asian="22pt" style:font-size-complex="22pt"/>
    </style:style>
    <style:style style:name="P2" style:family="paragraph" style:parent-style-name="Text_20_body">
      <style:text-properties fo:font-size="15pt" style:font-size-asian="15pt" style:font-size-complex="15pt"/>
    </style:style>
    <style:style style:name="P3" style:family="paragraph" style:parent-style-name="Text_20_body">
      <style:paragraph-properties fo:margin-left="0in" fo:margin-right="0in" fo:text-indent="0in" style:auto-text-indent="false"/>
      <style:text-properties fo:font-size="15pt" style:font-size-asian="15pt" style:font-size-complex="15pt"/>
    </style:style>
    <style:style style:name="P4" style:family="paragraph" style:parent-style-name="Standard">
      <style:paragraph-properties fo:margin-left="0in" fo:margin-right="0in" fo:text-indent="0in" style:auto-text-indent="false"/>
      <style:text-properties fo:font-size="15pt" style:font-size-asian="15pt" style:font-size-complex="15pt"/>
    </style:style>
    <style:style style:name="P5" style:family="paragraph" style:parent-style-name="Text_20_body">
      <style:paragraph-properties fo:margin-left="0in" fo:margin-right="0in" fo:text-indent="0in" style:auto-text-indent="false"/>
    </style:style>
    <style:style style:name="P6" style:family="paragraph" style:parent-style-name="Heading_20_2">
      <style:text-properties fo:font-size="28pt" style:font-size-asian="28pt" style:font-size-complex="28pt"/>
    </style:style>
    <style:style style:name="P7" style:family="paragraph" style:parent-style-name="Text_20_body">
      <style:paragraph-properties fo:margin-left="0in" fo:margin-right="0in" fo:text-indent="0in" style:auto-text-indent="false"/>
      <style:text-properties fo:color="#e06a3e" loext:opacity="100%" fo:font-size="15pt" fo:font-weight="bold" style:font-size-asian="15pt" style:font-weight-asian="bold" style:font-size-complex="15pt" style:font-weight-complex="bold"/>
    </style:style>
    <style:style style:name="P8" style:family="paragraph" style:parent-style-name="Standard">
      <style:paragraph-properties fo:margin-left="0in" fo:margin-right="0in" fo:text-indent="0in" style:auto-text-indent="false"/>
    </style:style>
    <style:style style:name="P9" style:family="paragraph" style:parent-style-name="Text_20_body">
      <style:text-properties fo:font-size="15pt" fo:font-weight="bold" style:font-size-asian="15pt" style:font-weight-asian="bold" style:font-size-complex="15pt" style:font-weight-complex="bold"/>
    </style:style>
    <style:style style:name="P10" style:family="paragraph" style:parent-style-name="Text_20_body" style:list-style-name="L1">
      <style:paragraph-properties fo:margin-top="0in" fo:margin-bottom="0in" style:contextual-spacing="false"/>
      <style:text-properties fo:font-size="15pt" fo:font-weight="bold" style:font-size-asian="15pt" style:font-weight-asian="bold" style:font-size-complex="15pt" style:font-weight-complex="bold"/>
    </style:style>
    <style:style style:name="P11" style:family="paragraph" style:parent-style-name="Text_20_body" style:list-style-name="L1">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color="#e06a3e" loext:opacity="100%" fo:font-weight="bold" style:font-weight-asian="bold" style:font-weight-complex="bold"/>
    </style:style>
    <style:style style:name="T3" style:family="text">
      <style:text-properties fo:color="#bf0041" loext:opacity="100%" fo:font-weight="bold" style:font-weight-asian="bold" style:font-weight-complex="bold"/>
    </style:style>
    <style:style style:name="T4" style:family="text">
      <style:text-properties fo:color="#43c6d8" loext:opacity="100%" fo:font-weight="bold" style:font-weight-asian="bold" style:font-weight-complex="bold"/>
    </style:style>
    <style:style style:name="T5" style:family="text">
      <style:text-properties fo:color="#bf0041" loext:opacity="100%"/>
    </style:style>
    <style:style style:name="T6" style:family="text">
      <style:text-properties fo:color="#800080" loext:opacity="100%" fo:font-weight="bold" style:font-weight-asian="bold" style:font-weight-complex="bold"/>
    </style:style>
    <style:style style:name="T7" style:family="text">
      <style:text-properties fo:color="#43c6d8" loext:opacity="100%"/>
    </style:style>
    <style:style style:name="T8" style:family="text">
      <style:text-properties fo:color="#800080" loext:opacity="100%" fo:font-size="15pt" style:font-size-asian="15pt" style:font-size-complex="15pt"/>
    </style:style>
    <style:style style:name="T9" style:family="text">
      <style:text-properties fo:font-size="15pt" style:font-size-asian="15pt" style:font-size-complex="15pt"/>
    </style:style>
    <style:style style:name="T10" style:family="text">
      <style:text-properties fo:color="#e06a3e" loext:opacity="100%" fo:font-size="15pt" fo:font-weight="bold" style:font-size-asian="15pt" style:font-weight-asian="bold" style:font-size-complex="15pt" style:font-weight-complex="bold"/>
    </style:style>
    <style:style style:name="T11" style:family="text">
      <style:text-properties fo:color="#e06a3e" loext:opacity="100%" fo:font-size="15pt" style:font-size-asian="15pt" style:font-size-complex="15pt"/>
    </style:style>
    <style:style style:name="T12" style:family="text">
      <style:text-properties fo:color="#bf0041" loext:opacity="100%" fo:font-size="15pt" style:font-size-asian="15pt" style:font-size-complex="15pt"/>
    </style:style>
    <style:style style:name="T13" style:family="text">
      <style:text-properties fo:font-size="15pt" fo:font-weight="bold" style:font-size-asian="15pt" style:font-weight-asian="bold" style:font-size-complex="15pt" style:font-weight-complex="bold"/>
    </style:style>
    <style:style style:name="T14" style:family="text">
      <style:text-properties fo:color="#f3c969" loext:opacity="100%"/>
    </style:style>
    <style:style style:name="T15" style:family="text">
      <style:text-properties fo:color="#43c6d8" loext:opacity="100%" fo:font-size="15pt" fo:font-weight="bold" style:font-size-asian="15pt" style:font-weight-asian="bold" style:font-size-complex="15pt" style:font-weight-complex="bold"/>
    </style:style>
    <style:style style:name="T16" style:family="text">
      <style:text-properties fo:color="#800080" loext:opacity="100%" fo:font-size="15pt" fo:font-weight="bold" style:font-size-asian="15pt" style:font-weight-asian="bold" style:font-size-complex="15pt" style:font-weight-complex="bold"/>
    </style:style>
    <style:style style:name="T17" style:family="text">
      <style:text-properties fo:color="#800080" loext:opacity="100%"/>
    </style:style>
    <style:style style:name="T18" style:family="text">
      <style:text-properties fo:color="#bf0041" loext:opacity="100%" fo:font-size="15pt" fo:font-weight="bold" style:font-size-asian="15pt" style:font-weight-asian="bold" style:font-size-complex="15pt" style:font-weight-complex="bold"/>
    </style:style>
    <style:style style:name="T19" style:family="text">
      <style:text-properties fo:color="#e06a3e" loext:opacity="10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o...How Do I Add the Internet to Packet Tracer?</text:h>
      <text:p text:style-name="P2">You'd think adding the internet to Packet Tracer would mean, you know, adding the internet to Packet Tracer. Actually...no. Not really. At least, not in the way a lot of people on Google try to do it, where they start bridging network adapters and hacking their real machine into the simulation. I don't recommend that at all, because by the time you've wrestled that beast into submission, you're no longer learning networking, you're troubleshooting your lab setup. That's a travesty.</text:p>
      <text:p text:style-name="P3"><text:span text:style-name="T1">What I want is something way more practical. I want an emulated internet, not a fragile science project.</text:span> <text:span text:style-name="T2">So instead of using Packet Tracer's cloud object like it's some magical internet button, I just drop in a router and let that router play the role of the ISP.</text:span> That's it. Simple, clear, and way more useful for actually learning what matters.</text:p>
      <text:p text:style-name="P4">And here's the thing, <text:span text:style-name="T1">"</text:span><text:span text:style-name="T3">ISP Router</text:span><text:span text:style-name="T1">" idea is more realistic than it sounds.</text:span> <text:span text:style-name="T4">Your provider isn't using fairy dust and mystery boxes.</text:span> <text:span text:style-name="T3">They're using routers too, just bigger ones, with more interfaces, more scale, and more complexity.</text:span> <text:span text:style-name="T1">So if we're building out NetworkChuck Coffee and we want our cafe router to connect to "the internet,"</text:span> <text:span text:style-name="T1">using another router to represent the provider makes perfect sense,</text:span> right? <text:span text:style-name="T1">Fake Internet, Real Lessons</text:span></text:p>
      <text:p text:style-name="P2"/>
      <text:p text:style-name="P2">In the lesson,<text:span text:style-name="T1"> I removed the cloud and replaced it with a 1941 router labeled ISP Router.</text:span> <text:span text:style-name="T5">You can use other routers if you want,</text:span> <text:span text:style-name="T3">but the point is the same.</text:span><text:span text:style-name="T6"> I connect that router to the cafe edge router, assign an IP address to the link between them</text:span>, and <text:span text:style-name="T1">now we've got a believable </text:span><text:span text:style-name="T2">WAN</text:span> <text:span text:style-name="T2">handoff</text:span><text:span text:style-name="T1">, meaning </text:span><text:span text:style-name="T2">the connection from our business network out toward the provider side</text:span><text:span text:style-name="T1">.</text:span></text:p>
      <text:p text:style-name="P3">From there, I gave the ISP router a basic configuration. Hostname, console password, VTY password for remote access, enable secret, the usual housekeeping. <text:span text:style-name="T7">Nothing glamorous.</text:span> But <text:span text:style-name="T1">this matters because I want the router to behave like a real device in a real environment, not just some object floating in Packet Tracer with no personality and no structure.</text:span></text:p>
      <text:p text:style-name="P2">Then I configured the provider-facing interface with a public-style IP address and made sure the interface was up. Once that was done, I could ping across the point-to-point link from the ISP router to the cafe router. That told me the handoff itself <text:soft-page-break/>was alive. Before we ever touch <text:span text:style-name="T2">NAT</text:span>, <text:span text:style-name="T1">before we ever translate private addresses to public ones, I want that base connectivity working cleanly</text:span>.</text:p>
      <text:p text:style-name="P5"><text:span text:style-name="Strong_20_Emphasis"><text:span text:style-name="T8">REAL WORLD TIP:</text:span></text:span><text:span text:style-name="T9"> </text:span><text:span text:style-name="T10">When you're testing internet connectivity, don't start with a web browser. Start with a ping to a known public IP like 1.1.1.1 or 8.8.8.8. A browser introduces too many variables, DNS, certificates, filtering, web server issues. A direct ping gives you a fast, clean answer to the real question: "Do I have layer 3 connectivity or not?"</text:span></text:p>
      <text:h text:style-name="P6" text:outline-level="2">Why I Used 1.1.1.1 and 8.8.8.8</text:h>
      <text:p text:style-name="P5"><text:span text:style-name="T9">Now, I did something wicked cool on the ISP router. I created </text:span><text:span text:style-name="Strong_20_Emphasis"><text:span text:style-name="T11">loopback interfaces</text:span></text:span><text:span text:style-name="T9">, which are </text:span><text:span text:style-name="T10">virtual interfaces that live inside the router and act like always-on endpoints</text:span><text:span text:style-name="T9">. </text:span><text:span text:style-name="T12">One loopback got 1.1.1.1, and another got 8.8.8.8</text:span><text:span text:style-name="T9">. </text:span><text:span text:style-name="T13">Those are real public DNS server IPs</text:span><text:span text:style-name="T9">, </text:span><text:span text:style-name="T12">one commonly associated with Cloudflare and one with Google,</text:span><text:span text:style-name="T9"> and they've been go-to connectivity tests for network engineers for a long time.</text:span></text:p>
      <text:p text:style-name="P3"><text:span text:style-name="T3">Why use loopbacks</text:span><text:span text:style-name="T1">? Because I need something on the "internet side" that responds like an internet host.</text:span> <text:span text:style-name="T6">A loopback is perfect for that</text:span>.<text:span text:style-name="T14"> </text:span><text:span text:style-name="T2">It lets me simulate reachable public destinations without needing any extra devices, and it gives us a clean target to ping from the cafe router.</text:span></text:p>
      <text:p text:style-name="P2">So once those loopbacks were in place, I jumped over to the cafe router and tested connectivity to them. And boom, it worked. Why? Because the cafe router already had a default route, which is basically the router saying, "If I don't know where to send traffic, I'll throw it to this next-hop address." In our case, that next hop was the ISP router.</text:p>
      <text:p text:style-name="P7">When you configure a default route, you're giving your router a "send everything unknown this way" instruction. That's the backbone of getting traffic off your local network and toward the wider world.</text:p>
      <text:h text:style-name="P6" text:outline-level="2"><text:soft-page-break/></text:h>
      <text:h text:style-name="P6" text:outline-level="2">The Part That Fails, On Purpose</text:h>
      <text:p text:style-name="P5"><text:span text:style-name="T15">Now comes the fun part.</text:span><text:span text:style-name="T9"> I went to a PC inside the cafe LAN and tried to ping 1.1.1.1. And it failed. Complete fail. </text:span><text:span text:style-name="T12">If you paused and thought</text:span><text:span text:style-name="T9">, "</text:span><text:span text:style-name="T12">Wait, but the cafe router could ping it, so why can't the PC?</text:span><text:span text:style-name="T9">" ...good. </text:span><text:span text:style-name="Emphasis"><text:span text:style-name="T13">That's exactly the right question.</text:span></text:span></text:p>
      <text:p text:style-name="P2"><text:span text:style-name="T1">Here's what's happening.</text:span> The PC uses a private IP address, something like 192.168.x.x, and sends its traffic to the default gateway, which is the cafe router. The cafe router forwards that traffic to the ISP router just fine. But when the ISP router tries to send the reply back, it looks at the source address, sees that private IP, and says, "I have no clue how to reach that network."</text:p>
      <text:p text:style-name="P5"><text:span text:style-name="T9">The issue isn't the path going out. </text:span><text:span text:style-name="T16">The issue is the return path coming back.</text:span><text:span text:style-name="T9"> The </text:span><text:span text:style-name="T13">ISP router doesn't have a route to the private internal network</text:span><text:span text:style-name="T9"> of NetworkChuck Coffee, and </text:span><text:span text:style-name="T13">in the real world it absolutely shouldn't.</text:span><text:span text:style-name="T9"> </text:span><text:span text:style-name="T13">Internet providers are not supposed to know how to route directly to your internal 192.168 networks.</text:span><text:span text:style-name="T9"> </text:span><text:span text:style-name="T16">That's where</text:span><text:span text:style-name="T9"> </text:span><text:span text:style-name="Strong_20_Emphasis"><text:span text:style-name="T11">NAT</text:span></text:span><text:span text:style-name="T9">, or </text:span><text:span text:style-name="T10">Network Address Translation</text:span><text:span text:style-name="T9">, </text:span><text:span text:style-name="T16">comes in.</text:span></text:p>
      <text:h text:style-name="P6" text:outline-level="2">This Is Why NAT Exists</text:h>
      <text:p text:style-name="P3"><text:span text:style-name="T2">NAT</text:span><text:span text:style-name="T6"> is the thing that hides your inside network behind a public IP address.</text:span><text:span text:style-name="T17"> </text:span>That's the plain-English version. Instead of the PC showing up to the ISP router as 192.168.1.50, <text:span text:style-name="T2">NAT</text:span> <text:span text:style-name="T1">lets the cafe router rewrite that traffic so it appears to come from a public IP the ISP actually knows how to return traffic to.</text:span></text:p>
      <text:p text:style-name="P3"><text:span text:style-name="T4">Hang on, sidebar for a moment.</text:span> This is why <text:span text:style-name="T2">NAT</text:span> feels so magical when you first learn it. You can have a whole internal business, laptops, printers, point-of-sale systems, security cameras, all living on private addresses, and the outside world only sees one or a few public IPs. That's insane, in the best way. <text:span text:style-name="T4">Okay, sidebar done.</text:span></text:p>
      <text:p text:style-name="P8"><text:soft-page-break/><text:span text:style-name="T9">So this lesson really sets the stage. </text:span><text:span text:style-name="T13">I wasn't configuring NAT yet, not fully.</text:span><text:span text:style-name="Emphasis"><text:span text:style-name="T13"> </text:span></text:span><text:span text:style-name="Emphasis"><text:span text:style-name="T18">I was showing you the problem NAT solves.</text:span></text:span><text:span text:style-name="T13"> </text:span><text:span text:style-name="T9">First, I proved the router itself can reach the emulated internet. Then I showed you the internal PC cannot, even though it feels like it should. You see what just happened there? That's the perfect setup for the next step. What You Should Walk Away With</text:span></text:p>
      <text:p text:style-name="P9">If I were to boil this lesson down, I'd put it into three takeaways:</text:p>
      <text:list text:style-name="L1">
        <text:list-item>
          <text:p text:style-name="P10"><text:span text:style-name="T5">Don't overcomplicate Packet Tracer internet access.</text:span> Use a router as an ISP, not some hacked bridge to your real machine.</text:p>
        </text:list-item>
        <text:list-item>
          <text:p text:style-name="P10"><text:span text:style-name="T19">Loopback interfaces</text:span> <text:span text:style-name="T5">are perfect for simulating internet hosts.</text:span> They give you stable targets like 1.1.1.1 and 8.8.8.8.</text:p>
        </text:list-item>
        <text:list-item>
          <text:p text:style-name="P11"><text:span text:style-name="T5">Private hosts fail without</text:span><text:span text:style-name="T17"> </text:span><text:span text:style-name="T19">NAT</text:span>, not because they can't send traffic out, but <text:span text:style-name="T5">because the internet side doesn't know how to send traffic back</text:span>.</text:p>
        </text:list-item>
      </text:list>
      <text:p text:style-name="P2"><text:span text:style-name="T1">And that's a huge distinction</text:span>. <text:span text:style-name="T3">Outbound traffic is only half the story. Networking lives and dies on the return path.</text:span></text:p>
      <text:p text:style-name="P2">So now we've got NetworkChuck Coffee connected to a believable fake internet, our edge router can reach it, and our inside clients are still stuck.  In the next lesson, I'll show you how NAT fixes that mess and makes the whole thing work the way you'd expect.</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7T08:05:25.435764500</meta:creation-date>
    <meta:generator>LibreOffice/26.2.3.2$Windows_X86_64 LibreOffice_project/70e089b17412e4cb7773e41413306b17a2328c34</meta:generator>
    <dc:date>2026-06-07T08:22:28.319605800</dc:date>
    <meta:editing-duration>PT6M12S</meta:editing-duration>
    <meta:editing-cycles>1</meta:editing-cycles>
    <meta:document-statistic meta:table-count="0" meta:image-count="0" meta:object-count="0" meta:page-count="4" meta:paragraph-count="27" meta:word-count="1205" meta:character-count="6957" meta:non-whitespace-character-count="5781"/>
  </office:meta>
</office:document-meta>
</file>